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9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4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4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226Ra</text:p>
          </table:table-cell>
          <table:table-cell table:style-name="ce1" office:value-type="string" calcext:value-type="string">
            <text:p>232Th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Raeq</text:p>
          </table:table-cell>
          <table:table-cell table:style-name="ce1" office:value-type="string" calcext:value-type="string">
            <text:p>Theq</text:p>
          </table:table-cell>
          <table:table-cell table:style-name="ce1" office:value-type="string" calcext:value-type="string">
            <text:p>Keq</text:p>
          </table:table-cell>
          <table:table-cell table:style-name="ce1" office:value-type="string" calcext:value-type="string">
            <text:p>IG</text:p>
          </table:table-cell>
          <table:table-cell table:style-name="ce1" office:value-type="string" calcext:value-type="string">
            <text:p>IA</text:p>
          </table:table-cell>
          <table:table-cell table:style-name="ce1" office:value-type="string" calcext:value-type="string">
            <text:p>IB</text:p>
          </table:table-cell>
          <table:table-cell table:style-name="ce5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B1</text:p>
          </table:table-cell>
          <table:table-cell table:style-name="ce19" office:value-type="float" office:value="75.5947114542545" calcext:value-type="float">
            <text:p>75,59471</text:p>
          </table:table-cell>
          <table:table-cell table:style-name="ce19" office:value-type="float" office:value="153.027439135532" calcext:value-type="float">
            <text:p>153,02744</text:p>
          </table:table-cell>
          <table:table-cell table:style-name="ce19" office:value-type="float" office:value="933.783209859839" calcext:value-type="float">
            <text:p>933,78321</text:p>
          </table:table-cell>
          <table:table-cell table:style-name="ce19" office:value-type="float" office:value="366.325256577273" calcext:value-type="float">
            <text:p>366,32526</text:p>
          </table:table-cell>
          <table:table-cell table:style-name="ce19" office:value-type="float" office:value="257.301813695801" calcext:value-type="float">
            <text:p>257,30181</text:p>
          </table:table-cell>
          <table:table-cell table:style-name="ce19" office:value-type="float" office:value="4759.54371595609" calcext:value-type="float">
            <text:p>4759,54372</text:p>
          </table:table-cell>
          <table:table-cell table:style-name="ce19" office:value-type="float" office:value="1.32838063714512" calcext:value-type="float">
            <text:p>1,32838</text:p>
          </table:table-cell>
          <table:table-cell table:style-name="ce19" office:value-type="float" office:value="0.377973557271272" calcext:value-type="float">
            <text:p>0,37797</text:p>
          </table:table-cell>
          <table:table-cell table:style-name="ce19" office:value-type="float" office:value="1.14898092620663" calcext:value-type="float">
            <text:p>1,14898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2</text:p>
          </table:table-cell>
          <table:table-cell table:style-name="ce19" office:value-type="float" office:value="64.8576660900111" calcext:value-type="float">
            <text:p>64,85767</text:p>
          </table:table-cell>
          <table:table-cell table:style-name="ce19" office:value-type="float" office:value="103.288510291657" calcext:value-type="float">
            <text:p>103,28851</text:p>
          </table:table-cell>
          <table:table-cell table:style-name="ce19" office:value-type="float" office:value="448.732522331361" calcext:value-type="float">
            <text:p>448,73252</text:p>
          </table:table-cell>
          <table:table-cell table:style-name="ce19" office:value-type="float" office:value="247.112640026595" calcext:value-type="float">
            <text:p>247,11264</text:p>
          </table:table-cell>
          <table:table-cell table:style-name="ce19" office:value-type="float" office:value="173.36916528289" calcext:value-type="float">
            <text:p>173,36917</text:p>
          </table:table-cell>
          <table:table-cell table:style-name="ce19" office:value-type="float" office:value="3214.1539213471" calcext:value-type="float">
            <text:p>3214,15392</text:p>
          </table:table-cell>
          <table:table-cell table:style-name="ce19" office:value-type="float" office:value="0.882212279202109" calcext:value-type="float">
            <text:p>0,88221</text:p>
          </table:table-cell>
          <table:table-cell table:style-name="ce19" office:value-type="float" office:value="0.324288330450055" calcext:value-type="float">
            <text:p>0,32429</text:p>
          </table:table-cell>
          <table:table-cell table:style-name="ce19" office:value-type="float" office:value="0.771208936051764" calcext:value-type="float">
            <text:p>0,77121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3</text:p>
          </table:table-cell>
          <table:table-cell table:style-name="ce19" office:value-type="float" office:value="62.5534786390267" calcext:value-type="float">
            <text:p>62,55348</text:p>
          </table:table-cell>
          <table:table-cell table:style-name="ce19" office:value-type="float" office:value="131.144145781345" calcext:value-type="float">
            <text:p>131,14415</text:p>
          </table:table-cell>
          <table:table-cell table:style-name="ce19" office:value-type="float" office:value="793.639846127628" calcext:value-type="float">
            <text:p>793,63985</text:p>
          </table:table-cell>
          <table:table-cell table:style-name="ce19" office:value-type="float" office:value="311.199875258178" calcext:value-type="float">
            <text:p>311,19988</text:p>
          </table:table-cell>
          <table:table-cell table:style-name="ce19" office:value-type="float" office:value="218.581772365683" calcext:value-type="float">
            <text:p>218,58177</text:p>
          </table:table-cell>
          <table:table-cell table:style-name="ce19" office:value-type="float" office:value="4042.76883443198" calcext:value-type="float">
            <text:p>4042,76883</text:p>
          </table:table-cell>
          <table:table-cell table:style-name="ce19" office:value-type="float" office:value="1.12877893974602" calcext:value-type="float">
            <text:p>1,12878</text:p>
          </table:table-cell>
          <table:table-cell table:style-name="ce19" office:value-type="float" office:value="0.312767393195133" calcext:value-type="float">
            <text:p>0,31277</text:p>
          </table:table-cell>
          <table:table-cell table:style-name="ce19" office:value-type="float" office:value="0.975401049032257" calcext:value-type="float">
            <text:p>0,97540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4</text:p>
          </table:table-cell>
          <table:table-cell table:style-name="ce19" office:value-type="float" office:value="86.8243203461325" calcext:value-type="float">
            <text:p>86,82432</text:p>
          </table:table-cell>
          <table:table-cell table:style-name="ce19" office:value-type="float" office:value="102.814855842151" calcext:value-type="float">
            <text:p>102,81486</text:p>
          </table:table-cell>
          <table:table-cell table:style-name="ce19" office:value-type="float" office:value="491.110776886444" calcext:value-type="float">
            <text:p>491,11078</text:p>
          </table:table-cell>
          <table:table-cell table:style-name="ce19" office:value-type="float" office:value="271.665094020664" calcext:value-type="float">
            <text:p>271,66509</text:p>
          </table:table-cell>
          <table:table-cell table:style-name="ce19" office:value-type="float" office:value="190.602972813198" calcext:value-type="float">
            <text:p>190,60297</text:p>
          </table:table-cell>
          <table:table-cell table:style-name="ce19" office:value-type="float" office:value="3538.62701711534" calcext:value-type="float">
            <text:p>3538,62702</text:p>
          </table:table-cell>
          <table:table-cell table:style-name="ce19" office:value-type="float" office:value="0.967192272660009" calcext:value-type="float">
            <text:p>0,96719</text:p>
          </table:table-cell>
          <table:table-cell table:style-name="ce19" office:value-type="float" office:value="0.434121601730663" calcext:value-type="float">
            <text:p>0,43412</text:p>
          </table:table-cell>
          <table:table-cell table:style-name="ce19" office:value-type="float" office:value="0.854229294075637" calcext:value-type="float">
            <text:p>0,85423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5</text:p>
          </table:table-cell>
          <table:table-cell table:style-name="ce19" office:value-type="float" office:value="92.1633856406162" calcext:value-type="float">
            <text:p>92,16339</text:p>
          </table:table-cell>
          <table:table-cell table:style-name="ce19" office:value-type="float" office:value="153.249914218987" calcext:value-type="float">
            <text:p>153,24991</text:p>
          </table:table-cell>
          <table:table-cell table:style-name="ce19" office:value-type="float" office:value="849.689709465823" calcext:value-type="float">
            <text:p>849,68971</text:p>
          </table:table-cell>
          <table:table-cell table:style-name="ce19" office:value-type="float" office:value="376.736870602635" calcext:value-type="float">
            <text:p>376,73687</text:p>
          </table:table-cell>
          <table:table-cell table:style-name="ce19" office:value-type="float" office:value="264.497218188038" calcext:value-type="float">
            <text:p>264,49722</text:p>
          </table:table-cell>
          <table:table-cell table:style-name="ce19" office:value-type="float" office:value="4898.92635183007" calcext:value-type="float">
            <text:p>4898,92635</text:p>
          </table:table-cell>
          <table:table-cell table:style-name="ce19" office:value-type="float" office:value="1.35669075971893" calcext:value-type="float">
            <text:p>1,35669</text:p>
          </table:table-cell>
          <table:table-cell table:style-name="ce19" office:value-type="float" office:value="0.460816928203081" calcext:value-type="float">
            <text:p>0,46082</text:p>
          </table:table-cell>
          <table:table-cell table:style-name="ce19" office:value-type="float" office:value="1.18177751401056" calcext:value-type="float">
            <text:p>1,18178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6</text:p>
          </table:table-cell>
          <table:table-cell table:style-name="ce19" office:value-type="float" office:value="77.8693912444941" calcext:value-type="float">
            <text:p>77,86939</text:p>
          </table:table-cell>
          <table:table-cell table:style-name="ce19" office:value-type="float" office:value="138.509327185297" calcext:value-type="float">
            <text:p>138,50933</text:p>
          </table:table-cell>
          <table:table-cell table:style-name="ce19" office:value-type="float" office:value="915.961050929266" calcext:value-type="float">
            <text:p>915,96105</text:p>
          </table:table-cell>
          <table:table-cell table:style-name="ce19" office:value-type="float" office:value="346.466730041022" calcext:value-type="float">
            <text:p>346,46673</text:p>
          </table:table-cell>
          <table:table-cell table:style-name="ce19" office:value-type="float" office:value="243.395758857552" calcext:value-type="float">
            <text:p>243,39576</text:p>
          </table:table-cell>
          <table:table-cell table:style-name="ce19" office:value-type="float" office:value="4503.83397084694" calcext:value-type="float">
            <text:p>4503,83397</text:p>
          </table:table-cell>
          <table:table-cell table:style-name="ce19" office:value-type="float" office:value="1.25743162371789" calcext:value-type="float">
            <text:p>1,25743</text:p>
          </table:table-cell>
          <table:table-cell table:style-name="ce19" office:value-type="float" office:value="0.38934695622247" calcext:value-type="float">
            <text:p>0,38935</text:p>
          </table:table-cell>
          <table:table-cell table:style-name="ce19" office:value-type="float" office:value="1.09112045934518" calcext:value-type="float">
            <text:p>1,09112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7</text:p>
          </table:table-cell>
          <table:table-cell table:style-name="ce19" office:value-type="float" office:value="78.9729764471363" calcext:value-type="float">
            <text:p>78,97298</text:p>
          </table:table-cell>
          <table:table-cell table:style-name="ce19" office:value-type="float" office:value="129.600892562068" calcext:value-type="float">
            <text:p>129,60089</text:p>
          </table:table-cell>
          <table:table-cell table:style-name="ce19" office:value-type="float" office:value="771.915769538585" calcext:value-type="float">
            <text:p>771,91577</text:p>
          </table:table-cell>
          <table:table-cell table:style-name="ce19" office:value-type="float" office:value="323.739767065365" calcext:value-type="float">
            <text:p>323,73977</text:p>
          </table:table-cell>
          <table:table-cell table:style-name="ce19" office:value-type="float" office:value="227.337343399686" calcext:value-type="float">
            <text:p>227,33734</text:p>
          </table:table-cell>
          <table:table-cell table:style-name="ce19" office:value-type="float" office:value="4209.95045439445" calcext:value-type="float">
            <text:p>4209,95045</text:p>
          </table:table-cell>
          <table:table-cell table:style-name="ce19" office:value-type="float" office:value="1.16855297414699" calcext:value-type="float">
            <text:p>1,16855</text:p>
          </table:table-cell>
          <table:table-cell table:style-name="ce19" office:value-type="float" office:value="0.394864882235682" calcext:value-type="float">
            <text:p>0,39486</text:p>
          </table:table-cell>
          <table:table-cell table:style-name="ce19" office:value-type="float" office:value="1.01766802092646" calcext:value-type="float">
            <text:p>1,01767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8</text:p>
          </table:table-cell>
          <table:table-cell table:style-name="ce19" office:value-type="float" office:value="90.9811036636774" calcext:value-type="float">
            <text:p>90,98110</text:p>
          </table:table-cell>
          <table:table-cell table:style-name="ce19" office:value-type="float" office:value="156.989257314599" calcext:value-type="float">
            <text:p>156,98926</text:p>
          </table:table-cell>
          <table:table-cell table:style-name="ce19" office:value-type="float" office:value="908.245603833316" calcext:value-type="float">
            <text:p>908,24560</text:p>
          </table:table-cell>
          <table:table-cell table:style-name="ce19" office:value-type="float" office:value="385.41065311872" calcext:value-type="float">
            <text:p>385,41065</text:p>
          </table:table-cell>
          <table:table-cell table:style-name="ce19" office:value-type="float" office:value="270.629538090006" calcext:value-type="float">
            <text:p>270,62954</text:p>
          </table:table-cell>
          <table:table-cell table:style-name="ce19" office:value-type="float" office:value="5010.85710636791" calcext:value-type="float">
            <text:p>5010,85711</text:p>
          </table:table-cell>
          <table:table-cell table:style-name="ce19" office:value-type="float" office:value="1.39096516672969" calcext:value-type="float">
            <text:p>1,39097</text:p>
          </table:table-cell>
          <table:table-cell table:style-name="ce19" office:value-type="float" office:value="0.454905518318387" calcext:value-type="float">
            <text:p>0,45491</text:p>
          </table:table-cell>
          <table:table-cell table:style-name="ce19" office:value-type="float" office:value="1.20968269653234" calcext:value-type="float">
            <text:p>1,20968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B9</text:p>
          </table:table-cell>
          <table:table-cell table:style-name="ce19" office:value-type="float" office:value="52.9701515333255" calcext:value-type="float">
            <text:p>52,97015</text:p>
          </table:table-cell>
          <table:table-cell table:style-name="ce19" office:value-type="float" office:value="151.635336649214" calcext:value-type="float">
            <text:p>151,63534</text:p>
          </table:table-cell>
          <table:table-cell table:style-name="ce19" office:value-type="float" office:value="798.521540599804" calcext:value-type="float">
            <text:p>798,52154</text:p>
          </table:table-cell>
          <table:table-cell table:style-name="ce19" office:value-type="float" office:value="331.294841567887" calcext:value-type="float">
            <text:p>331,29484</text:p>
          </table:table-cell>
          <table:table-cell table:style-name="ce19" office:value-type="float" office:value="232.633127455531" calcext:value-type="float">
            <text:p>232,63313</text:p>
          </table:table-cell>
          <table:table-cell table:style-name="ce19" office:value-type="float" office:value="4299.03466144553" calcext:value-type="float">
            <text:p>4299,03466</text:p>
          </table:table-cell>
          <table:table-cell table:style-name="ce19" office:value-type="float" office:value="1.20091770189042" calcext:value-type="float">
            <text:p>1,20092</text:p>
          </table:table-cell>
          <table:table-cell table:style-name="ce19" office:value-type="float" office:value="0.264850757666628" calcext:value-type="float">
            <text:p>0,26485</text:p>
          </table:table-cell>
          <table:table-cell table:style-name="ce19" office:value-type="float" office:value="1.03019261353831" calcext:value-type="float">
            <text:p>1,03019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1</text:p>
          </table:table-cell>
          <table:table-cell table:style-name="ce19" office:value-type="float" office:value="73.5878195425075" calcext:value-type="float">
            <text:p>73,58782</text:p>
          </table:table-cell>
          <table:table-cell table:style-name="ce19" office:value-type="float" office:value="122.362334608958" calcext:value-type="float">
            <text:p>122,36233</text:p>
          </table:table-cell>
          <table:table-cell table:style-name="ce19" office:value-type="float" office:value="678.43441918589" calcext:value-type="float">
            <text:p>678,43442</text:p>
          </table:table-cell>
          <table:table-cell table:style-name="ce19" office:value-type="float" office:value="300.805408310631" calcext:value-type="float">
            <text:p>300,80541</text:p>
          </table:table-cell>
          <table:table-cell table:style-name="ce19" office:value-type="float" office:value="211.187701343937" calcext:value-type="float">
            <text:p>211,18770</text:p>
          </table:table-cell>
          <table:table-cell table:style-name="ce19" office:value-type="float" office:value="3911.54584681006" calcext:value-type="float">
            <text:p>3911,54585</text:p>
          </table:table-cell>
          <table:table-cell table:style-name="ce19" office:value-type="float" office:value="1.08324921124845" calcext:value-type="float">
            <text:p>1,08325</text:p>
          </table:table-cell>
          <table:table-cell table:style-name="ce19" office:value-type="float" office:value="0.367939097712538" calcext:value-type="float">
            <text:p>0,36794</text:p>
          </table:table-cell>
          <table:table-cell table:style-name="ce19" office:value-type="float" office:value="0.943589798008432" calcext:value-type="float">
            <text:p>0,94359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2</text:p>
          </table:table-cell>
          <table:table-cell table:style-name="ce19" office:value-type="float" office:value="11.5859550794897" calcext:value-type="float">
            <text:p>11,58596</text:p>
          </table:table-cell>
          <table:table-cell table:style-name="ce19" office:value-type="float" office:value="23.6099768500524" calcext:value-type="float">
            <text:p>23,60998</text:p>
          </table:table-cell>
          <table:table-cell table:style-name="ce19" office:value-type="float" office:value="956.80340341031" calcext:value-type="float">
            <text:p>956,80340</text:p>
          </table:table-cell>
          <table:table-cell table:style-name="ce19" office:value-type="float" office:value="119.022084037658" calcext:value-type="float">
            <text:p>119,02208</text:p>
          </table:table-cell>
          <table:table-cell table:style-name="ce19" office:value-type="float" office:value="84.3443325932622" calcext:value-type="float">
            <text:p>84,34433</text:p>
          </table:table-cell>
          <table:table-cell table:style-name="ce19" office:value-type="float" office:value="1546.04162131472" calcext:value-type="float">
            <text:p>1546,04162</text:p>
          </table:table-cell>
          <table:table-cell table:style-name="ce19" office:value-type="float" office:value="0.475604202318664" calcext:value-type="float">
            <text:p>0,47560</text:p>
          </table:table-cell>
          <table:table-cell table:style-name="ce19" office:value-type="float" office:value="0.0579297753974483" calcext:value-type="float">
            <text:p>0,05793</text:p>
          </table:table-cell>
          <table:table-cell table:style-name="ce19" office:value-type="float" office:value="0.402773476976381" calcext:value-type="float">
            <text:p>0,40277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3</text:p>
          </table:table-cell>
          <table:table-cell table:style-name="ce19" office:value-type="float" office:value="32.4882790893958" calcext:value-type="float">
            <text:p>32,48828</text:p>
          </table:table-cell>
          <table:table-cell table:style-name="ce19" office:value-type="float" office:value="69.6243877364759" calcext:value-type="float">
            <text:p>69,62439</text:p>
          </table:table-cell>
          <table:table-cell table:style-name="ce19" office:value-type="float" office:value="817.059628721382" calcext:value-type="float">
            <text:p>817,05963</text:p>
          </table:table-cell>
          <table:table-cell table:style-name="ce19" office:value-type="float" office:value="194.964744964103" calcext:value-type="float">
            <text:p>194,96474</text:p>
          </table:table-cell>
          <table:table-cell table:style-name="ce19" office:value-type="float" office:value="137.304462678729" calcext:value-type="float">
            <text:p>137,30446</text:p>
          </table:table-cell>
          <table:table-cell table:style-name="ce19" office:value-type="float" office:value="2532.47064148033" calcext:value-type="float">
            <text:p>2532,47064</text:p>
          </table:table-cell>
          <table:table-cell table:style-name="ce19" office:value-type="float" office:value="0.728769411887492" calcext:value-type="float">
            <text:p>0,72877</text:p>
          </table:table-cell>
          <table:table-cell table:style-name="ce19" office:value-type="float" office:value="0.162441395446979" calcext:value-type="float">
            <text:p>0,16244</text:p>
          </table:table-cell>
          <table:table-cell table:style-name="ce19" office:value-type="float" office:value="0.62535688717813" calcext:value-type="float">
            <text:p>0,62536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4</text:p>
          </table:table-cell>
          <table:table-cell table:style-name="ce19" office:value-type="float" office:value="30.6989397142547" calcext:value-type="float">
            <text:p>30,69894</text:p>
          </table:table-cell>
          <table:table-cell table:style-name="ce19" office:value-type="float" office:value="77.5378191910517" calcext:value-type="float">
            <text:p>77,53782</text:p>
          </table:table-cell>
          <table:table-cell table:style-name="ce19" office:value-type="float" office:value="830.899267904998" calcext:value-type="float">
            <text:p>830,89927</text:p>
          </table:table-cell>
          <table:table-cell table:style-name="ce19" office:value-type="float" office:value="205.557264786144" calcext:value-type="float">
            <text:p>205,55726</text:p>
          </table:table-cell>
          <table:table-cell table:style-name="ce19" office:value-type="float" office:value="144.726536725805" calcext:value-type="float">
            <text:p>144,72654</text:p>
          </table:table-cell>
          <table:table-cell table:style-name="ce19" office:value-type="float" office:value="2668.70137198855" calcext:value-type="float">
            <text:p>2668,70137</text:p>
          </table:table-cell>
          <table:table-cell table:style-name="ce19" office:value-type="float" office:value="0.766985317637774" calcext:value-type="float">
            <text:p>0,76699</text:p>
          </table:table-cell>
          <table:table-cell table:style-name="ce19" office:value-type="float" office:value="0.153494698571273" calcext:value-type="float">
            <text:p>0,15349</text:p>
          </table:table-cell>
          <table:table-cell table:style-name="ce19" office:value-type="float" office:value="0.656209397872731" calcext:value-type="float">
            <text:p>0,65621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5</text:p>
          </table:table-cell>
          <table:table-cell table:style-name="ce19" office:value-type="float" office:value="8.31528627022454" calcext:value-type="float">
            <text:p>8,31529</text:p>
          </table:table-cell>
          <table:table-cell table:style-name="ce19" office:value-type="float" office:value="23.9909593105488" calcext:value-type="float">
            <text:p>23,99096</text:p>
          </table:table-cell>
          <table:table-cell table:style-name="ce19" office:value-type="float" office:value="946.990114710538" calcext:value-type="float">
            <text:p>946,99011</text:p>
          </table:table-cell>
          <table:table-cell table:style-name="ce19" office:value-type="float" office:value="115.540596917021" calcext:value-type="float">
            <text:p>115,54060</text:p>
          </table:table-cell>
          <table:table-cell table:style-name="ce19" office:value-type="float" office:value="81.8961160087856" calcext:value-type="float">
            <text:p>81,89612</text:p>
          </table:table-cell>
          <table:table-cell table:style-name="ce19" office:value-type="float" office:value="1499.95761380104" calcext:value-type="float">
            <text:p>1499,95761</text:p>
          </table:table-cell>
          <table:table-cell table:style-name="ce19" office:value-type="float" office:value="0.463335789023672" calcext:value-type="float">
            <text:p>0,46334</text:p>
          </table:table-cell>
          <table:table-cell table:style-name="ce19" office:value-type="float" office:value="0.0415764313511227" calcext:value-type="float">
            <text:p>0,04158</text:p>
          </table:table-cell>
          <table:table-cell table:style-name="ce19" office:value-type="float" office:value="0.390732761003185" calcext:value-type="float">
            <text:p>0,39073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CB6</text:p>
          </table:table-cell>
          <table:table-cell table:style-name="ce19" office:value-type="float" office:value="29.5898206558249" calcext:value-type="float">
            <text:p>29,58982</text:p>
          </table:table-cell>
          <table:table-cell table:style-name="ce19" office:value-type="float" office:value="62.7111746222094" calcext:value-type="float">
            <text:p>62,71117</text:p>
          </table:table-cell>
          <table:table-cell table:style-name="ce19" office:value-type="float" office:value="828.156297350931" calcext:value-type="float">
            <text:p>828,15630</text:p>
          </table:table-cell>
          <table:table-cell table:style-name="ce19" office:value-type="float" office:value="183.034835261606" calcext:value-type="float">
            <text:p>183,03484</text:p>
          </table:table-cell>
          <table:table-cell table:style-name="ce19" office:value-type="float" office:value="128.972645435588" calcext:value-type="float">
            <text:p>128,97265</text:p>
          </table:table-cell>
          <table:table-cell table:style-name="ce19" office:value-type="float" office:value="2377.57380636004" calcext:value-type="float">
            <text:p>2377,57381</text:p>
          </table:table-cell>
          <table:table-cell table:style-name="ce19" office:value-type="float" office:value="0.68824070774744" calcext:value-type="float">
            <text:p>0,68824</text:p>
          </table:table-cell>
          <table:table-cell table:style-name="ce19" office:value-type="float" office:value="0.147949103279125" calcext:value-type="float">
            <text:p>0,14795</text:p>
          </table:table-cell>
          <table:table-cell table:style-name="ce19" office:value-type="float" office:value="0.589972712376103" calcext:value-type="float">
            <text:p>0,58997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1</text:p>
          </table:table-cell>
          <table:table-cell table:style-name="ce19" office:value-type="float" office:value="24.3842253109864" calcext:value-type="float">
            <text:p>24,38423</text:p>
          </table:table-cell>
          <table:table-cell table:style-name="ce19" office:value-type="float" office:value="50.2454903766084" calcext:value-type="float">
            <text:p>50,24549</text:p>
          </table:table-cell>
          <table:table-cell table:style-name="ce19" office:value-type="float" office:value="241.073175131728" calcext:value-type="float">
            <text:p>241,07318</text:p>
          </table:table-cell>
          <table:table-cell table:style-name="ce19" office:value-type="float" office:value="114.797911034679" calcext:value-type="float">
            <text:p>114,79791</text:p>
          </table:table-cell>
          <table:table-cell table:style-name="ce19" office:value-type="float" office:value="80.5734727265439" calcext:value-type="float">
            <text:p>80,57347</text:p>
          </table:table-cell>
          <table:table-cell table:style-name="ce19" office:value-type="float" office:value="1491.45207060138" calcext:value-type="float">
            <text:p>1491,45207</text:p>
          </table:table-cell>
          <table:table-cell table:style-name="ce19" office:value-type="float" office:value="0.412865927963572" calcext:value-type="float">
            <text:p>0,41287</text:p>
          </table:table-cell>
          <table:table-cell table:style-name="ce19" office:value-type="float" office:value="0.121921126554932" calcext:value-type="float">
            <text:p>0,12192</text:p>
          </table:table-cell>
          <table:table-cell table:style-name="ce19" office:value-type="float" office:value="0.357601731809081" calcext:value-type="float">
            <text:p>0,35760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2</text:p>
          </table:table-cell>
          <table:table-cell table:style-name="ce19" office:value-type="float" office:value="20.8382683677211" calcext:value-type="float">
            <text:p>20,83827</text:p>
          </table:table-cell>
          <table:table-cell table:style-name="ce19" office:value-type="float" office:value="60.6737974749532" calcext:value-type="float">
            <text:p>60,67380</text:p>
          </table:table-cell>
          <table:table-cell table:style-name="ce19" office:value-type="float" office:value="471.487314011935" calcext:value-type="float">
            <text:p>471,48731</text:p>
          </table:table-cell>
          <table:table-cell table:style-name="ce19" office:value-type="float" office:value="143.906321935823" calcext:value-type="float">
            <text:p>143,90632</text:p>
          </table:table-cell>
          <table:table-cell table:style-name="ce19" office:value-type="float" office:value="101.192387603014" calcext:value-type="float">
            <text:p>101,19239</text:p>
          </table:table-cell>
          <table:table-cell table:style-name="ce19" office:value-type="float" office:value="1867.4242885882" calcext:value-type="float">
            <text:p>1867,42429</text:p>
          </table:table-cell>
          <table:table-cell table:style-name="ce19" office:value-type="float" office:value="0.529992319937815" calcext:value-type="float">
            <text:p>0,52999</text:p>
          </table:table-cell>
          <table:table-cell table:style-name="ce19" office:value-type="float" office:value="0.104191341838605" calcext:value-type="float">
            <text:p>0,10419</text:p>
          </table:table-cell>
          <table:table-cell table:style-name="ce19" office:value-type="float" office:value="0.453237082374691" calcext:value-type="float">
            <text:p>0,45324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3</text:p>
          </table:table-cell>
          <table:table-cell table:style-name="ce19" office:value-type="float" office:value="33.3919505632386" calcext:value-type="float">
            <text:p>33,39195</text:p>
          </table:table-cell>
          <table:table-cell table:style-name="ce19" office:value-type="float" office:value="124.758431965205" calcext:value-type="float">
            <text:p>124,75843</text:p>
          </table:table-cell>
          <table:table-cell table:style-name="ce19" office:value-type="float" office:value="504.668817792661" calcext:value-type="float">
            <text:p>504,66882</text:p>
          </table:table-cell>
          <table:table-cell table:style-name="ce19" office:value-type="float" office:value="250.656007243516" calcext:value-type="float">
            <text:p>250,65601</text:p>
          </table:table-cell>
          <table:table-cell table:style-name="ce19" office:value-type="float" office:value="175.889582338068" calcext:value-type="float">
            <text:p>175,88958</text:p>
          </table:table-cell>
          <table:table-cell table:style-name="ce19" office:value-type="float" office:value="3249.81889732762" calcext:value-type="float">
            <text:p>3249,81890</text:p>
          </table:table-cell>
          <table:table-cell table:style-name="ce19" office:value-type="float" office:value="0.903321600967706" calcext:value-type="float">
            <text:p>0,90332</text:p>
          </table:table-cell>
          <table:table-cell table:style-name="ce19" office:value-type="float" office:value="0.166959752816193" calcext:value-type="float">
            <text:p>0,16696</text:p>
          </table:table-cell>
          <table:table-cell table:style-name="ce19" office:value-type="float" office:value="0.771319084452666" calcext:value-type="float">
            <text:p>0,77132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4</text:p>
          </table:table-cell>
          <table:table-cell table:style-name="ce19" office:value-type="float" office:value="26.7492494305838" calcext:value-type="float">
            <text:p>26,74925</text:p>
          </table:table-cell>
          <table:table-cell table:style-name="ce19" office:value-type="float" office:value="55.4189601911224" calcext:value-type="float">
            <text:p>55,41896</text:p>
          </table:table-cell>
          <table:table-cell table:style-name="ce19" office:value-type="float" office:value="379.844783229564" calcext:value-type="float">
            <text:p>379,84478</text:p>
          </table:table-cell>
          <table:table-cell table:style-name="ce19" office:value-type="float" office:value="135.246410812565" calcext:value-type="float">
            <text:p>135,24641</text:p>
          </table:table-cell>
          <table:table-cell table:style-name="ce19" office:value-type="float" office:value="95.034897870157" calcext:value-type="float">
            <text:p>95,03490</text:p>
          </table:table-cell>
          <table:table-cell table:style-name="ce19" office:value-type="float" office:value="1757.03885081861" calcext:value-type="float">
            <text:p>1757,03885</text:p>
          </table:table-cell>
          <table:table-cell table:style-name="ce19" office:value-type="float" office:value="0.492873893467413" calcext:value-type="float">
            <text:p>0,49287</text:p>
          </table:table-cell>
          <table:table-cell table:style-name="ce19" office:value-type="float" office:value="0.133746247152919" calcext:value-type="float">
            <text:p>0,13375</text:p>
          </table:table-cell>
          <table:table-cell table:style-name="ce19" office:value-type="float" office:value="0.425588938684279" calcext:value-type="float">
            <text:p>0,42559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5</text:p>
          </table:table-cell>
          <table:table-cell table:style-name="ce19" office:value-type="float" office:value="27.3907461511358" calcext:value-type="float">
            <text:p>27,39075</text:p>
          </table:table-cell>
          <table:table-cell table:style-name="ce19" office:value-type="float" office:value="59.9490163812729" calcext:value-type="float">
            <text:p>59,94902</text:p>
          </table:table-cell>
          <table:table-cell table:style-name="ce19" office:value-type="float" office:value="428.013896746671" calcext:value-type="float">
            <text:p>428,01390</text:p>
          </table:table-cell>
          <table:table-cell table:style-name="ce19" office:value-type="float" office:value="146.07490962585" calcext:value-type="float">
            <text:p>146,07491</text:p>
          </table:table-cell>
          <table:table-cell table:style-name="ce19" office:value-type="float" office:value="102.663303008135" calcext:value-type="float">
            <text:p>102,66330</text:p>
          </table:table-cell>
          <table:table-cell table:style-name="ce19" office:value-type="float" office:value="1897.32621818601" calcext:value-type="float">
            <text:p>1897,32622</text:p>
          </table:table-cell>
          <table:table-cell table:style-name="ce19" office:value-type="float" office:value="0.533718867992374" calcext:value-type="float">
            <text:p>0,53372</text:p>
          </table:table-cell>
          <table:table-cell table:style-name="ce19" office:value-type="float" office:value="0.136953730755679" calcext:value-type="float">
            <text:p>0,13695</text:p>
          </table:table-cell>
          <table:table-cell table:style-name="ce19" office:value-type="float" office:value="0.459982804522054" calcext:value-type="float">
            <text:p>0,45998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6</text:p>
          </table:table-cell>
          <table:table-cell table:style-name="ce19" office:value-type="float" office:value="26.3962671240288" calcext:value-type="float">
            <text:p>26,39627</text:p>
          </table:table-cell>
          <table:table-cell table:style-name="ce19" office:value-type="float" office:value="65.5077591598284" calcext:value-type="float">
            <text:p>65,50776</text:p>
          </table:table-cell>
          <table:table-cell table:style-name="ce19" office:value-type="float" office:value="460.601189762618" calcext:value-type="float">
            <text:p>460,60119</text:p>
          </table:table-cell>
          <table:table-cell table:style-name="ce19" office:value-type="float" office:value="155.538654334305" calcext:value-type="float">
            <text:p>155,53865</text:p>
          </table:table-cell>
          <table:table-cell table:style-name="ce19" office:value-type="float" office:value="109.318211583592" calcext:value-type="float">
            <text:p>109,31821</text:p>
          </table:table-cell>
          <table:table-cell table:style-name="ce19" office:value-type="float" office:value="2019.36100057519" calcext:value-type="float">
            <text:p>2019,36100</text:p>
          </table:table-cell>
          <table:table-cell table:style-name="ce19" office:value-type="float" office:value="0.56906008280011" calcext:value-type="float">
            <text:p>0,56906</text:p>
          </table:table-cell>
          <table:table-cell table:style-name="ce19" office:value-type="float" office:value="0.131981335620144" calcext:value-type="float">
            <text:p>0,13198</text:p>
          </table:table-cell>
          <table:table-cell table:style-name="ce19" office:value-type="float" office:value="0.488881328513441" calcext:value-type="float">
            <text:p>0,48888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7</text:p>
          </table:table-cell>
          <table:table-cell table:style-name="ce19" office:value-type="float" office:value="62.3527534707764" calcext:value-type="float">
            <text:p>62,35275</text:p>
          </table:table-cell>
          <table:table-cell table:style-name="ce19" office:value-type="float" office:value="102.859145619172" calcext:value-type="float">
            <text:p>102,85915</text:p>
          </table:table-cell>
          <table:table-cell table:style-name="ce19" office:value-type="float" office:value="374.651355346244" calcext:value-type="float">
            <text:p>374,65136</text:p>
          </table:table-cell>
          <table:table-cell table:style-name="ce19" office:value-type="float" office:value="238.289486067853" calcext:value-type="float">
            <text:p>238,28949</text:p>
          </table:table-cell>
          <table:table-cell table:style-name="ce19" office:value-type="float" office:value="167.111897592759" calcext:value-type="float">
            <text:p>167,11190</text:p>
          </table:table-cell>
          <table:table-cell table:style-name="ce19" office:value-type="float" office:value="3098.98163942924" calcext:value-type="float">
            <text:p>3098,98164</text:p>
          </table:table-cell>
          <table:table-cell table:style-name="ce19" office:value-type="float" office:value="0.847022024780529" calcext:value-type="float">
            <text:p>0,84702</text:p>
          </table:table-cell>
          <table:table-cell table:style-name="ce19" office:value-type="float" office:value="0.311763767353882" calcext:value-type="float">
            <text:p>0,31176</text:p>
          </table:table-cell>
          <table:table-cell table:style-name="ce19" office:value-type="float" office:value="0.740492105911983" calcext:value-type="float">
            <text:p>0,74049</text:p>
          </table:table-cell>
          <table:table-cell table:style-name="ce9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HB8</text:p>
          </table:table-cell>
          <table:table-cell table:style-name="ce19" office:value-type="float" office:value="19.6644663546217" calcext:value-type="float">
            <text:p>19,66447</text:p>
          </table:table-cell>
          <table:table-cell table:style-name="ce19" office:value-type="float" office:value="37.9435560160703" calcext:value-type="float">
            <text:p>37,94356</text:p>
          </table:table-cell>
          <table:table-cell table:style-name="ce19" office:value-type="float" office:value="295.505693714049" calcext:value-type="float">
            <text:p>295,50569</text:p>
          </table:table-cell>
          <table:table-cell table:style-name="ce19" office:value-type="float" office:value="96.677689873584" calcext:value-type="float">
            <text:p>96,67769</text:p>
          </table:table-cell>
          <table:table-cell table:style-name="ce19" office:value-type="float" office:value="67.9614956185782" calcext:value-type="float">
            <text:p>67,96150</text:p>
          </table:table-cell>
          <table:table-cell table:style-name="ce19" office:value-type="float" office:value="1256.3012723059" calcext:value-type="float">
            <text:p>1256,30127</text:p>
          </table:table-cell>
          <table:table-cell table:style-name="ce19" office:value-type="float" office:value="0.353767899167107" calcext:value-type="float">
            <text:p>0,35377</text:p>
          </table:table-cell>
          <table:table-cell table:style-name="ce19" office:value-type="float" office:value="0.0983223317731086" calcext:value-type="float">
            <text:p>0,09832</text:p>
          </table:table-cell>
          <table:table-cell table:style-name="ce19" office:value-type="float" office:value="0.305731286169601" calcext:value-type="float">
            <text:p>0,30573</text:p>
          </table:table-cell>
          <table:table-cell table:style-name="ce9" table:number-columns-repeated="3"/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HB9</text:p>
          </table:table-cell>
          <table:table-cell table:style-name="ce19" office:value-type="float" office:value="58.2350731379345" calcext:value-type="float">
            <text:p>58,23507</text:p>
          </table:table-cell>
          <table:table-cell table:style-name="ce19" office:value-type="float" office:value="101.851672810856" calcext:value-type="float">
            <text:p>101,85167</text:p>
          </table:table-cell>
          <table:table-cell table:style-name="ce19" office:value-type="float" office:value="484.959205468258" calcext:value-type="float">
            <text:p>484,95921</text:p>
          </table:table-cell>
          <table:table-cell table:style-name="ce19" office:value-type="float" office:value="241.224824078514" calcext:value-type="float">
            <text:p>241,22482</text:p>
          </table:table-cell>
          <table:table-cell table:style-name="ce19" office:value-type="float" office:value="169.288980308164" calcext:value-type="float">
            <text:p>169,28898</text:p>
          </table:table-cell>
          <table:table-cell table:style-name="ce19" office:value-type="float" office:value="3136.17345390291" calcext:value-type="float">
            <text:p>3136,17345</text:p>
          </table:table-cell>
          <table:table-cell table:style-name="ce19" office:value-type="float" office:value="0.86502834300348" calcext:value-type="float">
            <text:p>0,86503</text:p>
          </table:table-cell>
          <table:table-cell table:style-name="ce19" office:value-type="float" office:value="0.291175365689672" calcext:value-type="float">
            <text:p>0,29118</text:p>
          </table:table-cell>
          <table:table-cell table:style-name="ce19" office:value-type="float" office:value="0.753209770912863" calcext:value-type="float">
            <text:p>0,75321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HB10</text:p>
          </table:table-cell>
          <table:table-cell table:style-name="ce19" office:value-type="float" office:value="56.6359557051473" calcext:value-type="float">
            <text:p>56,63596</text:p>
          </table:table-cell>
          <table:table-cell table:style-name="ce19" office:value-type="float" office:value="103.959424232065" calcext:value-type="float">
            <text:p>103,95942</text:p>
          </table:table-cell>
          <table:table-cell table:style-name="ce19" office:value-type="float" office:value="464.278299318424" calcext:value-type="float">
            <text:p>464,27830</text:p>
          </table:table-cell>
          <table:table-cell table:style-name="ce19" office:value-type="float" office:value="241.047361404519" calcext:value-type="float">
            <text:p>241,04736</text:p>
          </table:table-cell>
          <table:table-cell table:style-name="ce19" office:value-type="float" office:value="169.139899688181" calcext:value-type="float">
            <text:p>169,13990</text:p>
          </table:table-cell>
          <table:table-cell table:style-name="ce19" office:value-type="float" office:value="3133.22932417849" calcext:value-type="float">
            <text:p>3133,22932</text:p>
          </table:table-cell>
          <table:table-cell table:style-name="ce19" office:value-type="float" office:value="0.863343073283624" calcext:value-type="float">
            <text:p>0,86334</text:p>
          </table:table-cell>
          <table:table-cell table:style-name="ce19" office:value-type="float" office:value="0.283179778525736" calcext:value-type="float">
            <text:p>0,28318</text:p>
          </table:table-cell>
          <table:table-cell table:style-name="ce19" office:value-type="float" office:value="0.750916980905879" calcext:value-type="float">
            <text:p>0,75092</text:p>
          </table:table-cell>
          <table:table-cell table:style-name="ce9" table:number-columns-repeated="3"/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HB11</text:p>
          </table:table-cell>
          <table:table-cell table:style-name="ce19" office:value-type="float" office:value="26.9311596609319" calcext:value-type="float">
            <text:p>26,93116</text:p>
          </table:table-cell>
          <table:table-cell table:style-name="ce19" office:value-type="float" office:value="52.8265256376647" calcext:value-type="float">
            <text:p>52,82653</text:p>
          </table:table-cell>
          <table:table-cell table:style-name="ce19" office:value-type="float" office:value="465.761792109146" calcext:value-type="float">
            <text:p>465,76179</text:p>
          </table:table-cell>
          <table:table-cell table:style-name="ce19" office:value-type="float" office:value="138.336749315197" calcext:value-type="float">
            <text:p>138,33675</text:p>
          </table:table-cell>
          <table:table-cell table:style-name="ce19" office:value-type="float" office:value="97.29523596632" calcext:value-type="float">
            <text:p>97,29524</text:p>
          </table:table-cell>
          <table:table-cell table:style-name="ce19" office:value-type="float" office:value="1797.50800929117" calcext:value-type="float">
            <text:p>1797,50801</text:p>
          </table:table-cell>
          <table:table-cell table:style-name="ce19" office:value-type="float" office:value="0.509157091094478" calcext:value-type="float">
            <text:p>0,50916</text:p>
          </table:table-cell>
          <table:table-cell table:style-name="ce19" office:value-type="float" office:value="0.13465579830466" calcext:value-type="float">
            <text:p>0,13466</text:p>
          </table:table-cell>
          <table:table-cell table:style-name="ce19" office:value-type="float" office:value="0.43925933127925" calcext:value-type="float">
            <text:p>0,43926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HB12</text:p>
          </table:table-cell>
          <table:table-cell table:style-name="ce19" office:value-type="float" office:value="45.2868977854641" calcext:value-type="float">
            <text:p>45,28690</text:p>
          </table:table-cell>
          <table:table-cell table:style-name="ce19" office:value-type="float" office:value="67.7060253986006" calcext:value-type="float">
            <text:p>67,70603</text:p>
          </table:table-cell>
          <table:table-cell table:style-name="ce19" office:value-type="float" office:value="299.981011663521" calcext:value-type="float">
            <text:p>299,98101</text:p>
          </table:table-cell>
          <table:table-cell table:style-name="ce19" office:value-type="float" office:value="165.205052003554" calcext:value-type="float">
            <text:p>165,20505</text:p>
          </table:table-cell>
          <table:table-cell table:style-name="ce19" office:value-type="float" office:value="115.905809489919" calcext:value-type="float">
            <text:p>115,90581</text:p>
          </table:table-cell>
          <table:table-cell table:style-name="ce19" office:value-type="float" office:value="2149.43276720123" calcext:value-type="float">
            <text:p>2149,43277</text:p>
          </table:table-cell>
          <table:table-cell table:style-name="ce19" office:value-type="float" office:value="0.589480123499057" calcext:value-type="float">
            <text:p>0,58948</text:p>
          </table:table-cell>
          <table:table-cell table:style-name="ce19" office:value-type="float" office:value="0.226434488927321" calcext:value-type="float">
            <text:p>0,22643</text:p>
          </table:table-cell>
          <table:table-cell table:style-name="ce19" office:value-type="float" office:value="0.516392823907805" calcext:value-type="float">
            <text:p>0,51639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HB13</text:p>
          </table:table-cell>
          <table:table-cell table:style-name="ce19" office:value-type="float" office:value="29.3803549156516" calcext:value-type="float">
            <text:p>29,38035</text:p>
          </table:table-cell>
          <table:table-cell table:style-name="ce19" office:value-type="float" office:value="63.8689161029245" calcext:value-type="float">
            <text:p>63,86892</text:p>
          </table:table-cell>
          <table:table-cell table:style-name="ce19" office:value-type="float" office:value="519.920891968088" calcext:value-type="float">
            <text:p>519,92089</text:p>
          </table:table-cell>
          <table:table-cell table:style-name="ce19" office:value-type="float" office:value="160.746813624376" calcext:value-type="float">
            <text:p>160,74681</text:p>
          </table:table-cell>
          <table:table-cell table:style-name="ce19" office:value-type="float" office:value="113.030813602125" calcext:value-type="float">
            <text:p>113,03081</text:p>
          </table:table-cell>
          <table:table-cell table:style-name="ce19" office:value-type="float" office:value="2087.9369823113" calcext:value-type="float">
            <text:p>2087,93698</text:p>
          </table:table-cell>
          <table:table-cell table:style-name="ce19" office:value-type="float" office:value="0.59058606088949" calcext:value-type="float">
            <text:p>0,59059</text:p>
          </table:table-cell>
          <table:table-cell table:style-name="ce19" office:value-type="float" office:value="0.146901774578258" calcext:value-type="float">
            <text:p>0,14690</text:p>
          </table:table-cell>
          <table:table-cell table:style-name="ce19" office:value-type="float" office:value="0.508477470138826" calcext:value-type="float">
            <text:p>0,50848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HB14</text:p>
          </table:table-cell>
          <table:table-cell table:style-name="ce20" office:value-type="float" office:value="28.9751272790156" calcext:value-type="float">
            <text:p>28,97513</text:p>
          </table:table-cell>
          <table:table-cell table:style-name="ce20" office:value-type="float" office:value="54.7039458519372" calcext:value-type="float">
            <text:p>54,70395</text:p>
          </table:table-cell>
          <table:table-cell table:style-name="ce20" office:value-type="float" office:value="1122.83429573404" calcext:value-type="float">
            <text:p>1122,83430</text:p>
          </table:table-cell>
          <table:table-cell table:style-name="ce20" office:value-type="float" office:value="193.660010618807" calcext:value-type="float">
            <text:p>193,66001</text:p>
          </table:table-cell>
          <table:table-cell table:style-name="ce20" office:value-type="float" office:value="136.74242121262" calcext:value-type="float">
            <text:p>136,74242</text:p>
          </table:table-cell>
          <table:table-cell table:style-name="ce20" office:value-type="float" office:value="2516.29982133497" calcext:value-type="float">
            <text:p>2516,29982</text:p>
          </table:table-cell>
          <table:table-cell table:style-name="ce20" office:value-type="float" office:value="0.744381585434418" calcext:value-type="float">
            <text:p>0,74438</text:p>
          </table:table-cell>
          <table:table-cell table:style-name="ce20" office:value-type="float" office:value="0.144875636395078" calcext:value-type="float">
            <text:p>0,14488</text:p>
          </table:table-cell>
          <table:table-cell table:style-name="ce20" office:value-type="float" office:value="0.636415280794802" calcext:value-type="float">
            <text:p>0,63642</text:p>
          </table:table-cell>
          <table:table-cell table:number-columns-repeated="11"/>
          <table:table-cell table:style-name="ce9" table:number-columns-repeated="6"/>
          <table:table-cell table:number-columns-repeated="995"/>
        </table:table-row>
        <table:table-row table:style-name="ro1">
          <table:table-cell table:style-name="ce2" office:value-type="string" calcext:value-type="string">
            <text:p>AR1</text:p>
          </table:table-cell>
          <table:table-cell table:style-name="ce19" office:value-type="float" office:value="98.74" calcext:value-type="float">
            <text:p>98,74000</text:p>
          </table:table-cell>
          <table:table-cell table:style-name="ce19" office:value-type="float" office:value="38.67" calcext:value-type="float">
            <text:p>38,67000</text:p>
          </table:table-cell>
          <table:table-cell table:style-name="ce19" office:value-type="float" office:value="1018.63" calcext:value-type="float">
            <text:p>1018,63000</text:p>
          </table:table-cell>
          <table:table-cell table:style-name="ce19" office:value-type="float" office:value="232.47261" calcext:value-type="float">
            <text:p>232,47261</text:p>
          </table:table-cell>
          <table:table-cell table:style-name="ce19" office:value-type="float" office:value="163.81265" calcext:value-type="float">
            <text:p>163,81265</text:p>
          </table:table-cell>
          <table:table-cell table:style-name="ce19" office:value-type="float" office:value="3039.7958" calcext:value-type="float">
            <text:p>3039,79580</text:p>
          </table:table-cell>
          <table:table-cell table:style-name="ce19" office:value-type="float" office:value="0.862026666666667" calcext:value-type="float">
            <text:p>0,86203</text:p>
          </table:table-cell>
          <table:table-cell table:style-name="ce19" office:value-type="float" office:value="0.4937" calcext:value-type="float">
            <text:p>0,49370</text:p>
          </table:table-cell>
          <table:table-cell table:style-name="ce19" office:value-type="float" office:value="0.773211111111111" calcext:value-type="float">
            <text:p>0,7732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2</text:p>
          </table:table-cell>
          <table:table-cell table:style-name="ce19" office:value-type="float" office:value="77.6088128263976" calcext:value-type="float">
            <text:p>77,60881</text:p>
          </table:table-cell>
          <table:table-cell table:style-name="ce19" office:value-type="float" office:value="25.5547538479073" calcext:value-type="float">
            <text:p>25,55475</text:p>
          </table:table-cell>
          <table:table-cell table:style-name="ce19" office:value-type="float" office:value="627.751780115718" calcext:value-type="float">
            <text:p>627,75178</text:p>
          </table:table-cell>
          <table:table-cell table:style-name="ce19" office:value-type="float" office:value="162.488997897815" calcext:value-type="float">
            <text:p>162,48900</text:p>
          </table:table-cell>
          <table:table-cell table:style-name="ce19" office:value-type="float" office:value="114.40727073275" calcext:value-type="float">
            <text:p>114,40727</text:p>
          </table:table-cell>
          <table:table-cell table:style-name="ce19" office:value-type="float" office:value="2127.03321796959" calcext:value-type="float">
            <text:p>2127,03322</text:p>
          </table:table-cell>
          <table:table-cell table:style-name="ce19" office:value-type="float" office:value="0.595720405366101" calcext:value-type="float">
            <text:p>0,59572</text:p>
          </table:table-cell>
          <table:table-cell table:style-name="ce19" office:value-type="float" office:value="0.388044064131988" calcext:value-type="float">
            <text:p>0,38804</text:p>
          </table:table-cell>
          <table:table-cell table:style-name="ce19" office:value-type="float" office:value="0.539549678264194" calcext:value-type="float">
            <text:p>0,5395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3</text:p>
          </table:table-cell>
          <table:table-cell table:style-name="ce19" office:value-type="float" office:value="69.1274971660131" calcext:value-type="float">
            <text:p>69,12750</text:p>
          </table:table-cell>
          <table:table-cell table:style-name="ce19" office:value-type="float" office:value="65.3219690536232" calcext:value-type="float">
            <text:p>65,32197</text:p>
          </table:table-cell>
          <table:table-cell table:style-name="ce19" office:value-type="float" office:value="688.475054816762" calcext:value-type="float">
            <text:p>688,47505</text:p>
          </table:table-cell>
          <table:table-cell table:style-name="ce19" office:value-type="float" office:value="215.550492133585" calcext:value-type="float">
            <text:p>215,55049</text:p>
          </table:table-cell>
          <table:table-cell table:style-name="ce19" office:value-type="float" office:value="151.577345084754" calcext:value-type="float">
            <text:p>151,57735</text:p>
          </table:table-cell>
          <table:table-cell table:style-name="ce19" office:value-type="float" office:value="2809.56666602466" calcext:value-type="float">
            <text:p>2809,56667</text:p>
          </table:table-cell>
          <table:table-cell table:style-name="ce19" office:value-type="float" office:value="0.786526520760414" calcext:value-type="float">
            <text:p>0,78653</text:p>
          </table:table-cell>
          <table:table-cell table:style-name="ce19" office:value-type="float" office:value="0.345637485830066" calcext:value-type="float">
            <text:p>0,34564</text:p>
          </table:table-cell>
          <table:table-cell table:style-name="ce19" office:value-type="float" office:value="0.693842932392574" calcext:value-type="float">
            <text:p>0,69384</text:p>
          </table:table-cell>
          <table:table-cell table:style-name="ce9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AR4</text:p>
          </table:table-cell>
          <table:table-cell table:style-name="ce19" office:value-type="float" office:value="65.4610889657758" calcext:value-type="float">
            <text:p>65,46109</text:p>
          </table:table-cell>
          <table:table-cell table:style-name="ce19" office:value-type="float" office:value="40.389911957491" calcext:value-type="float">
            <text:p>40,38991</text:p>
          </table:table-cell>
          <table:table-cell table:style-name="ce19" office:value-type="float" office:value="915.408422038641" calcext:value-type="float">
            <text:p>915,40842</text:p>
          </table:table-cell>
          <table:table-cell table:style-name="ce19" office:value-type="float" office:value="193.705111561963" calcext:value-type="float">
            <text:p>193,70511</text:p>
          </table:table-cell>
          <table:table-cell table:style-name="ce19" office:value-type="float" office:value="136.560137445659" calcext:value-type="float">
            <text:p>136,56014</text:p>
          </table:table-cell>
          <table:table-cell table:style-name="ce19" office:value-type="float" office:value="2527.7110146808" calcext:value-type="float">
            <text:p>2527,71101</text:p>
          </table:table-cell>
          <table:table-cell table:style-name="ce19" office:value-type="float" office:value="0.725289330352922" calcext:value-type="float">
            <text:p>0,72529</text:p>
          </table:table-cell>
          <table:table-cell table:style-name="ce19" office:value-type="float" office:value="0.327305444828879" calcext:value-type="float">
            <text:p>0,32731</text:p>
          </table:table-cell>
          <table:table-cell table:style-name="ce19" office:value-type="float" office:value="0.640775046941754" calcext:value-type="float">
            <text:p>0,6407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5</text:p>
          </table:table-cell>
          <table:table-cell table:style-name="ce19" office:value-type="float" office:value="111.56448117436" calcext:value-type="float">
            <text:p>111,56448</text:p>
          </table:table-cell>
          <table:table-cell table:style-name="ce19" office:value-type="float" office:value="106.909434156435" calcext:value-type="float">
            <text:p>106,90943</text:p>
          </table:table-cell>
          <table:table-cell table:style-name="ce19" office:value-type="float" office:value="483.747223085452" calcext:value-type="float">
            <text:p>483,74722</text:p>
          </table:table-cell>
          <table:table-cell table:style-name="ce19" office:value-type="float" office:value="301.693508195642" calcext:value-type="float">
            <text:p>301,69351</text:p>
          </table:table-cell>
          <table:table-cell table:style-name="ce19" office:value-type="float" office:value="211.610668248187" calcext:value-type="float">
            <text:p>211,61067</text:p>
          </table:table-cell>
          <table:table-cell table:style-name="ce19" office:value-type="float" office:value="3934.40910836178" calcext:value-type="float">
            <text:p>3934,40911</text:p>
          </table:table-cell>
          <table:table-cell table:style-name="ce19" office:value-type="float" office:value="1.06767784905853" calcext:value-type="float">
            <text:p>1,06768</text:p>
          </table:table-cell>
          <table:table-cell table:style-name="ce19" office:value-type="float" office:value="0.5578224058718" calcext:value-type="float">
            <text:p>0,55782</text:p>
          </table:table-cell>
          <table:table-cell table:style-name="ce19" office:value-type="float" office:value="0.951711808201195" calcext:value-type="float">
            <text:p>0,95171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6</text:p>
          </table:table-cell>
          <table:table-cell table:style-name="ce19" office:value-type="float" office:value="55.9789606122573" calcext:value-type="float">
            <text:p>55,97896</text:p>
          </table:table-cell>
          <table:table-cell table:style-name="ce19" office:value-type="float" office:value="33.9167299670255" calcext:value-type="float">
            <text:p>33,91673</text:p>
          </table:table-cell>
          <table:table-cell table:style-name="ce19" office:value-type="float" office:value="401.338374327966" calcext:value-type="float">
            <text:p>401,33837</text:p>
          </table:table-cell>
          <table:table-cell table:style-name="ce19" office:value-type="float" office:value="135.382939288357" calcext:value-type="float">
            <text:p>135,38294</text:p>
          </table:table-cell>
          <table:table-cell table:style-name="ce19" office:value-type="float" office:value="95.1756129836437" calcext:value-type="float">
            <text:p>95,17561</text:p>
          </table:table-cell>
          <table:table-cell table:style-name="ce19" office:value-type="float" office:value="1768.60264802554" calcext:value-type="float">
            <text:p>1768,60265</text:p>
          </table:table-cell>
          <table:table-cell table:style-name="ce19" office:value-type="float" office:value="0.48995964331864" calcext:value-type="float">
            <text:p>0,48996</text:p>
          </table:table-cell>
          <table:table-cell table:style-name="ce19" office:value-type="float" office:value="0.279894803061286" calcext:value-type="float">
            <text:p>0,27989</text:p>
          </table:table-cell>
          <table:table-cell table:style-name="ce19" office:value-type="float" office:value="0.439399125327899" calcext:value-type="float">
            <text:p>0,43940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7</text:p>
          </table:table-cell>
          <table:table-cell table:style-name="ce19" office:value-type="float" office:value="133.887253783041" calcext:value-type="float">
            <text:p>133,88725</text:p>
          </table:table-cell>
          <table:table-cell table:style-name="ce19" office:value-type="float" office:value="136.189041032029" calcext:value-type="float">
            <text:p>136,18904</text:p>
          </table:table-cell>
          <table:table-cell table:style-name="ce19" office:value-type="float" office:value="587.087806113191" calcext:value-type="float">
            <text:p>587,08781</text:p>
          </table:table-cell>
          <table:table-cell table:style-name="ce19" office:value-type="float" office:value="373.843343529558" calcext:value-type="float">
            <text:p>373,84334</text:p>
          </table:table-cell>
          <table:table-cell table:style-name="ce19" office:value-type="float" office:value="262.199948016383" calcext:value-type="float">
            <text:p>262,19995</text:p>
          </table:table-cell>
          <table:table-cell table:style-name="ce19" office:value-type="float" office:value="4873.80474365191" calcext:value-type="float">
            <text:p>4873,80474</text:p>
          </table:table-cell>
          <table:table-cell table:style-name="ce19" office:value-type="float" office:value="1.32293198647468" calcext:value-type="float">
            <text:p>1,32293</text:p>
          </table:table-cell>
          <table:table-cell table:style-name="ce19" office:value-type="float" office:value="0.669436268915207" calcext:value-type="float">
            <text:p>0,66944</text:p>
          </table:table-cell>
          <table:table-cell table:style-name="ce19" office:value-type="float" office:value="1.17682512971948" calcext:value-type="float">
            <text:p>1,17683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8</text:p>
          </table:table-cell>
          <table:table-cell table:style-name="ce19" office:value-type="float" office:value="71.4369014439794" calcext:value-type="float">
            <text:p>71,43690</text:p>
          </table:table-cell>
          <table:table-cell table:style-name="ce19" office:value-type="float" office:value="77.7264163338052" calcext:value-type="float">
            <text:p>77,72642</text:p>
          </table:table-cell>
          <table:table-cell table:style-name="ce19" office:value-type="float" office:value="452.884310609708" calcext:value-type="float">
            <text:p>452,88431</text:p>
          </table:table-cell>
          <table:table-cell table:style-name="ce19" office:value-type="float" office:value="217.457768718268" calcext:value-type="float">
            <text:p>217,45777</text:p>
          </table:table-cell>
          <table:table-cell table:style-name="ce19" office:value-type="float" office:value="152.640884428125" calcext:value-type="float">
            <text:p>152,64088</text:p>
          </table:table-cell>
          <table:table-cell table:style-name="ce19" office:value-type="float" office:value="2833.53853125004" calcext:value-type="float">
            <text:p>2833,53853</text:p>
          </table:table-cell>
          <table:table-cell table:style-name="ce19" office:value-type="float" office:value="0.777716523352193" calcext:value-type="float">
            <text:p>0,77772</text:p>
          </table:table-cell>
          <table:table-cell table:style-name="ce19" office:value-type="float" office:value="0.357184507219897" calcext:value-type="float">
            <text:p>0,35718</text:p>
          </table:table-cell>
          <table:table-cell table:style-name="ce19" office:value-type="float" office:value="0.687784270262372" calcext:value-type="float">
            <text:p>0,6877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9</text:p>
          </table:table-cell>
          <table:table-cell table:style-name="ce19" office:value-type="float" office:value="41.73" calcext:value-type="float">
            <text:p>41,73000</text:p>
          </table:table-cell>
          <table:table-cell table:style-name="ce19" office:value-type="float" office:value="20.17" calcext:value-type="float">
            <text:p>20,17000</text:p>
          </table:table-cell>
          <table:table-cell table:style-name="ce19" office:value-type="float" office:value="525.24" calcext:value-type="float">
            <text:p>525,24000</text:p>
          </table:table-cell>
          <table:table-cell table:style-name="ce19" office:value-type="float" office:value="111.01658" calcext:value-type="float">
            <text:p>111,01658</text:p>
          </table:table-cell>
          <table:table-cell table:style-name="ce19" office:value-type="float" office:value="78.2692" calcext:value-type="float">
            <text:p>78,26920</text:p>
          </table:table-cell>
          <table:table-cell table:style-name="ce19" office:value-type="float" office:value="1450.0834" calcext:value-type="float">
            <text:p>1450,08340</text:p>
          </table:table-cell>
          <table:table-cell table:style-name="ce19" office:value-type="float" office:value="0.41503" calcext:value-type="float">
            <text:p>0,41503</text:p>
          </table:table-cell>
          <table:table-cell table:style-name="ce19" office:value-type="float" office:value="0.20865" calcext:value-type="float">
            <text:p>0,20865</text:p>
          </table:table-cell>
          <table:table-cell table:style-name="ce19" office:value-type="float" office:value="0.369041666666667" calcext:value-type="float">
            <text:p>0,36904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0</text:p>
          </table:table-cell>
          <table:table-cell table:style-name="ce19" office:value-type="float" office:value="83.89" calcext:value-type="float">
            <text:p>83,89000</text:p>
          </table:table-cell>
          <table:table-cell table:style-name="ce19" office:value-type="float" office:value="31.38" calcext:value-type="float">
            <text:p>31,38000</text:p>
          </table:table-cell>
          <table:table-cell table:style-name="ce19" office:value-type="float" office:value="787.94" calcext:value-type="float">
            <text:p>787,94000</text:p>
          </table:table-cell>
          <table:table-cell table:style-name="ce19" office:value-type="float" office:value="189.43478" calcext:value-type="float">
            <text:p>189,43478</text:p>
          </table:table-cell>
          <table:table-cell table:style-name="ce19" office:value-type="float" office:value="133.4397" calcext:value-type="float">
            <text:p>133,43970</text:p>
          </table:table-cell>
          <table:table-cell table:style-name="ce19" office:value-type="float" office:value="2477.9184" calcext:value-type="float">
            <text:p>2477,91840</text:p>
          </table:table-cell>
          <table:table-cell table:style-name="ce19" office:value-type="float" office:value="0.69918" calcext:value-type="float">
            <text:p>0,69918</text:p>
          </table:table-cell>
          <table:table-cell table:style-name="ce19" office:value-type="float" office:value="0.41945" calcext:value-type="float">
            <text:p>0,41945</text:p>
          </table:table-cell>
          <table:table-cell table:style-name="ce19" office:value-type="float" office:value="0.629255555555556" calcext:value-type="float">
            <text:p>0,62926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1</text:p>
          </table:table-cell>
          <table:table-cell table:style-name="ce19" office:value-type="float" office:value="61.81" calcext:value-type="float">
            <text:p>61,81000</text:p>
          </table:table-cell>
          <table:table-cell table:style-name="ce19" office:value-type="float" office:value="26.87" calcext:value-type="float">
            <text:p>26,87000</text:p>
          </table:table-cell>
          <table:table-cell table:style-name="ce19" office:value-type="float" office:value="659.4" calcext:value-type="float">
            <text:p>659,40000</text:p>
          </table:table-cell>
          <table:table-cell table:style-name="ce19" office:value-type="float" office:value="151.0079" calcext:value-type="float">
            <text:p>151,00790</text:p>
          </table:table-cell>
          <table:table-cell table:style-name="ce19" office:value-type="float" office:value="106.404" calcext:value-type="float">
            <text:p>106,40400</text:p>
          </table:table-cell>
          <table:table-cell table:style-name="ce19" office:value-type="float" office:value="1973.7846" calcext:value-type="float">
            <text:p>1973,78460</text:p>
          </table:table-cell>
          <table:table-cell table:style-name="ce19" office:value-type="float" office:value="0.560183333333333" calcext:value-type="float">
            <text:p>0,56018</text:p>
          </table:table-cell>
          <table:table-cell table:style-name="ce19" office:value-type="float" office:value="0.30905" calcext:value-type="float">
            <text:p>0,30905</text:p>
          </table:table-cell>
          <table:table-cell table:style-name="ce19" office:value-type="float" office:value="0.501158333333333" calcext:value-type="float">
            <text:p>0,50116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2</text:p>
          </table:table-cell>
          <table:table-cell table:style-name="ce19" office:value-type="float" office:value="53.22" calcext:value-type="float">
            <text:p>53,22000</text:p>
          </table:table-cell>
          <table:table-cell table:style-name="ce19" office:value-type="float" office:value="26.58" calcext:value-type="float">
            <text:p>26,58000</text:p>
          </table:table-cell>
          <table:table-cell table:style-name="ce19" office:value-type="float" office:value="575.91" calcext:value-type="float">
            <text:p>575,91000</text:p>
          </table:table-cell>
          <table:table-cell table:style-name="ce19" office:value-type="float" office:value="135.57447" calcext:value-type="float">
            <text:p>135,57447</text:p>
          </table:table-cell>
          <table:table-cell table:style-name="ce19" office:value-type="float" office:value="95.50905" calcext:value-type="float">
            <text:p>95,50905</text:p>
          </table:table-cell>
          <table:table-cell table:style-name="ce19" office:value-type="float" office:value="1771.2096" calcext:value-type="float">
            <text:p>1771,20960</text:p>
          </table:table-cell>
          <table:table-cell table:style-name="ce19" office:value-type="float" office:value="0.50227" calcext:value-type="float">
            <text:p>0,50227</text:p>
          </table:table-cell>
          <table:table-cell table:style-name="ce19" office:value-type="float" office:value="0.2661" calcext:value-type="float">
            <text:p>0,26610</text:p>
          </table:table-cell>
          <table:table-cell table:style-name="ce19" office:value-type="float" office:value="0.448125" calcext:value-type="float">
            <text:p>0,44813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3</text:p>
          </table:table-cell>
          <table:table-cell table:style-name="ce19" office:value-type="float" office:value="43.21" calcext:value-type="float">
            <text:p>43,21000</text:p>
          </table:table-cell>
          <table:table-cell table:style-name="ce19" office:value-type="float" office:value="26.37" calcext:value-type="float">
            <text:p>26,37000</text:p>
          </table:table-cell>
          <table:table-cell table:style-name="ce19" office:value-type="float" office:value="753.56" calcext:value-type="float">
            <text:p>753,56000</text:p>
          </table:table-cell>
          <table:table-cell table:style-name="ce19" office:value-type="float" office:value="138.94322" calcext:value-type="float">
            <text:p>138,94322</text:p>
          </table:table-cell>
          <table:table-cell table:style-name="ce19" office:value-type="float" office:value="98.0628" calcext:value-type="float">
            <text:p>98,06280</text:p>
          </table:table-cell>
          <table:table-cell table:style-name="ce19" office:value-type="float" office:value="1812.4506" calcext:value-type="float">
            <text:p>1812,45060</text:p>
          </table:table-cell>
          <table:table-cell table:style-name="ce19" office:value-type="float" office:value="0.52707" calcext:value-type="float">
            <text:p>0,52707</text:p>
          </table:table-cell>
          <table:table-cell table:style-name="ce19" office:value-type="float" office:value="0.21605" calcext:value-type="float">
            <text:p>0,21605</text:p>
          </table:table-cell>
          <table:table-cell table:style-name="ce19" office:value-type="float" office:value="0.463230555555555" calcext:value-type="float">
            <text:p>0,46323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4</text:p>
          </table:table-cell>
          <table:table-cell table:style-name="ce19" office:value-type="float" office:value="57.26074697758" calcext:value-type="float">
            <text:p>57,26075</text:p>
          </table:table-cell>
          <table:table-cell table:style-name="ce19" office:value-type="float" office:value="24.996976321411" calcext:value-type="float">
            <text:p>24,99698</text:p>
          </table:table-cell>
          <table:table-cell table:style-name="ce19" office:value-type="float" office:value="759.450455799857" calcext:value-type="float">
            <text:p>759,45046</text:p>
          </table:table-cell>
          <table:table-cell table:style-name="ce19" office:value-type="float" office:value="151.484108213787" calcext:value-type="float">
            <text:p>151,48411</text:p>
          </table:table-cell>
          <table:table-cell table:style-name="ce19" office:value-type="float" office:value="106.849274274709" calcext:value-type="float">
            <text:p>106,84927</text:p>
          </table:table-cell>
          <table:table-cell table:style-name="ce19" office:value-type="float" office:value="1979.02692867626" calcext:value-type="float">
            <text:p>1979,02693</text:p>
          </table:table-cell>
          <table:table-cell table:style-name="ce19" office:value-type="float" office:value="0.569004190132274" calcext:value-type="float">
            <text:p>0,56900</text:p>
          </table:table-cell>
          <table:table-cell table:style-name="ce19" office:value-type="float" office:value="0.2863037348879" calcext:value-type="float">
            <text:p>0,28630</text:p>
          </table:table-cell>
          <table:table-cell table:style-name="ce19" office:value-type="float" office:value="0.505981684542217" calcext:value-type="float">
            <text:p>0,5059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5</text:p>
          </table:table-cell>
          <table:table-cell table:style-name="ce19" office:value-type="float" office:value="45.7273041346659" calcext:value-type="float">
            <text:p>45,72730</text:p>
          </table:table-cell>
          <table:table-cell table:style-name="ce19" office:value-type="float" office:value="22.3672197643263" calcext:value-type="float">
            <text:p>22,36722</text:p>
          </table:table-cell>
          <table:table-cell table:style-name="ce19" office:value-type="float" office:value="687.106412014448" calcext:value-type="float">
            <text:p>687,10641</text:p>
          </table:table-cell>
          <table:table-cell table:style-name="ce19" office:value-type="float" office:value="130.619622122765" calcext:value-type="float">
            <text:p>130,61962</text:p>
          </table:table-cell>
          <table:table-cell table:style-name="ce19" office:value-type="float" office:value="92.1671853193871" calcext:value-type="float">
            <text:p>92,16719</text:p>
          </table:table-cell>
          <table:table-cell table:style-name="ce19" office:value-type="float" office:value="1705.43479560689" calcext:value-type="float">
            <text:p>1705,43480</text:p>
          </table:table-cell>
          <table:table-cell table:style-name="ce19" office:value-type="float" office:value="0.493295916608667" calcext:value-type="float">
            <text:p>0,49330</text:p>
          </table:table-cell>
          <table:table-cell table:style-name="ce19" office:value-type="float" office:value="0.22863652067333" calcext:value-type="float">
            <text:p>0,22864</text:p>
          </table:table-cell>
          <table:table-cell table:style-name="ce19" office:value-type="float" office:value="0.436483988359815" calcext:value-type="float">
            <text:p>0,4364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6</text:p>
          </table:table-cell>
          <table:table-cell table:style-name="ce19" office:value-type="float" office:value="45.5491824648729" calcext:value-type="float">
            <text:p>45,54918</text:p>
          </table:table-cell>
          <table:table-cell table:style-name="ce19" office:value-type="float" office:value="24.5460341501638" calcext:value-type="float">
            <text:p>24,54603</text:p>
          </table:table-cell>
          <table:table-cell table:style-name="ce19" office:value-type="float" office:value="799.125253879099" calcext:value-type="float">
            <text:p>799,12525</text:p>
          </table:table-cell>
          <table:table-cell table:style-name="ce19" office:value-type="float" office:value="142.182655848298" calcext:value-type="float">
            <text:p>142,18266</text:p>
          </table:table-cell>
          <table:table-cell table:style-name="ce19" office:value-type="float" office:value="100.382350838925" calcext:value-type="float">
            <text:p>100,38235</text:p>
          </table:table-cell>
          <table:table-cell table:style-name="ce19" office:value-type="float" office:value="1855.31622012604" calcext:value-type="float">
            <text:p>1855,31622</text:p>
          </table:table-cell>
          <table:table-cell table:style-name="ce19" office:value-type="float" office:value="0.540935863593429" calcext:value-type="float">
            <text:p>0,54094</text:p>
          </table:table-cell>
          <table:table-cell table:style-name="ce19" office:value-type="float" office:value="0.227745912324364" calcext:value-type="float">
            <text:p>0,22775</text:p>
          </table:table-cell>
          <table:table-cell table:style-name="ce19" office:value-type="float" office:value="0.476084987697231" calcext:value-type="float">
            <text:p>0,4760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7</text:p>
          </table:table-cell>
          <table:table-cell table:style-name="ce19" office:value-type="float" office:value="54.0352274345652" calcext:value-type="float">
            <text:p>54,03523</text:p>
          </table:table-cell>
          <table:table-cell table:style-name="ce19" office:value-type="float" office:value="16.5903829388755" calcext:value-type="float">
            <text:p>16,59038</text:p>
          </table:table-cell>
          <table:table-cell table:style-name="ce19" office:value-type="float" office:value="633.978545303534" calcext:value-type="float">
            <text:p>633,97855</text:p>
          </table:table-cell>
          <table:table-cell table:style-name="ce19" office:value-type="float" office:value="126.575823025529" calcext:value-type="float">
            <text:p>126,57582</text:p>
          </table:table-cell>
          <table:table-cell table:style-name="ce19" office:value-type="float" office:value="89.2838621347656" calcext:value-type="float">
            <text:p>89,28386</text:p>
          </table:table-cell>
          <table:table-cell table:style-name="ce19" office:value-type="float" office:value="1655.66342558882" calcext:value-type="float">
            <text:p>1655,66343</text:p>
          </table:table-cell>
          <table:table-cell table:style-name="ce19" office:value-type="float" office:value="0.474395521244106" calcext:value-type="float">
            <text:p>0,47440</text:p>
          </table:table-cell>
          <table:table-cell table:style-name="ce19" office:value-type="float" office:value="0.270176137172826" calcext:value-type="float">
            <text:p>0,27018</text:p>
          </table:table-cell>
          <table:table-cell table:style-name="ce19" office:value-type="float" office:value="0.425349171833736" calcext:value-type="float">
            <text:p>0,42535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8</text:p>
          </table:table-cell>
          <table:table-cell table:style-name="ce19" office:value-type="float" office:value="54.5899754504705" calcext:value-type="float">
            <text:p>54,58998</text:p>
          </table:table-cell>
          <table:table-cell table:style-name="ce19" office:value-type="float" office:value="26.8409911266747" calcext:value-type="float">
            <text:p>26,84099</text:p>
          </table:table-cell>
          <table:table-cell table:style-name="ce19" office:value-type="float" office:value="634.3871010169" calcext:value-type="float">
            <text:p>634,38710</text:p>
          </table:table-cell>
          <table:table-cell table:style-name="ce19" office:value-type="float" office:value="141.820399539917" calcext:value-type="float">
            <text:p>141,82040</text:p>
          </table:table-cell>
          <table:table-cell table:style-name="ce19" office:value-type="float" office:value="99.9452644979336" calcext:value-type="float">
            <text:p>99,94526</text:p>
          </table:table-cell>
          <table:table-cell table:style-name="ce19" office:value-type="float" office:value="1852.64307217955" calcext:value-type="float">
            <text:p>1852,64307</text:p>
          </table:table-cell>
          <table:table-cell table:style-name="ce19" office:value-type="float" office:value="0.527633907473909" calcext:value-type="float">
            <text:p>0,52763</text:p>
          </table:table-cell>
          <table:table-cell table:style-name="ce19" office:value-type="float" office:value="0.272949877252352" calcext:value-type="float">
            <text:p>0,27295</text:p>
          </table:table-cell>
          <table:table-cell table:style-name="ce19" office:value-type="float" office:value="0.470022687034074" calcext:value-type="float">
            <text:p>0,47002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19</text:p>
          </table:table-cell>
          <table:table-cell table:style-name="ce19" office:value-type="float" office:value="40.26" calcext:value-type="float">
            <text:p>40,26000</text:p>
          </table:table-cell>
          <table:table-cell table:style-name="ce19" office:value-type="float" office:value="15.14" calcext:value-type="float">
            <text:p>15,14000</text:p>
          </table:table-cell>
          <table:table-cell table:style-name="ce19" office:value-type="float" office:value="666.06" calcext:value-type="float">
            <text:p>666,06000</text:p>
          </table:table-cell>
          <table:table-cell table:style-name="ce19" office:value-type="float" office:value="113.19682" calcext:value-type="float">
            <text:p>113,19682</text:p>
          </table:table-cell>
          <table:table-cell table:style-name="ce19" office:value-type="float" office:value="79.9553" calcext:value-type="float">
            <text:p>79,95530</text:p>
          </table:table-cell>
          <table:table-cell table:style-name="ce19" office:value-type="float" office:value="1478.5868" calcext:value-type="float">
            <text:p>1478,58680</text:p>
          </table:table-cell>
          <table:table-cell table:style-name="ce19" office:value-type="float" office:value="0.43192" calcext:value-type="float">
            <text:p>0,43192</text:p>
          </table:table-cell>
          <table:table-cell table:style-name="ce19" office:value-type="float" office:value="0.2013" calcext:value-type="float">
            <text:p>0,20130</text:p>
          </table:table-cell>
          <table:table-cell table:style-name="ce19" office:value-type="float" office:value="0.3823" calcext:value-type="float">
            <text:p>0,38230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20</text:p>
          </table:table-cell>
          <table:table-cell table:style-name="ce19" office:value-type="float" office:value="68.69" calcext:value-type="float">
            <text:p>68,69000</text:p>
          </table:table-cell>
          <table:table-cell table:style-name="ce19" office:value-type="float" office:value="26.01" calcext:value-type="float">
            <text:p>26,01000</text:p>
          </table:table-cell>
          <table:table-cell table:style-name="ce19" office:value-type="float" office:value="288.66" calcext:value-type="float">
            <text:p>288,66000</text:p>
          </table:table-cell>
          <table:table-cell table:style-name="ce19" office:value-type="float" office:value="128.11112" calcext:value-type="float">
            <text:p>128,11112</text:p>
          </table:table-cell>
          <table:table-cell table:style-name="ce19" office:value-type="float" office:value="89.9693" calcext:value-type="float">
            <text:p>89,96930</text:p>
          </table:table-cell>
          <table:table-cell table:style-name="ce19" office:value-type="float" office:value="1678.2602" calcext:value-type="float">
            <text:p>1678,26020</text:p>
          </table:table-cell>
          <table:table-cell table:style-name="ce19" office:value-type="float" office:value="0.455236666666667" calcext:value-type="float">
            <text:p>0,45524</text:p>
          </table:table-cell>
          <table:table-cell table:style-name="ce19" office:value-type="float" office:value="0.34345" calcext:value-type="float">
            <text:p>0,34345</text:p>
          </table:table-cell>
          <table:table-cell table:style-name="ce19" office:value-type="float" office:value="0.417525" calcext:value-type="float">
            <text:p>0,41753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21</text:p>
          </table:table-cell>
          <table:table-cell table:style-name="ce19" office:value-type="float" office:value="198.411572801985" calcext:value-type="float">
            <text:p>198,41157</text:p>
          </table:table-cell>
          <table:table-cell table:style-name="ce19" office:value-type="float" office:value="127.716695408045" calcext:value-type="float">
            <text:p>127,71670</text:p>
          </table:table-cell>
          <table:table-cell table:style-name="ce19" office:value-type="float" office:value="606.530713184439" calcext:value-type="float">
            <text:p>606,53071</text:p>
          </table:table-cell>
          <table:table-cell table:style-name="ce19" office:value-type="float" office:value="427.749312150692" calcext:value-type="float">
            <text:p>427,74931</text:p>
          </table:table-cell>
          <table:table-cell table:style-name="ce19" office:value-type="float" office:value="299.963985594579" calcext:value-type="float">
            <text:p>299,96399</text:p>
          </table:table-cell>
          <table:table-cell table:style-name="ce19" office:value-type="float" office:value="5591.15013431524" calcext:value-type="float">
            <text:p>5591,15013</text:p>
          </table:table-cell>
          <table:table-cell table:style-name="ce19" office:value-type="float" office:value="1.50213229077499" calcext:value-type="float">
            <text:p>1,50213</text:p>
          </table:table-cell>
          <table:table-cell table:style-name="ce19" office:value-type="float" office:value="0.992057864009927" calcext:value-type="float">
            <text:p>0,99206</text:p>
          </table:table-cell>
          <table:table-cell table:style-name="ce19" office:value-type="float" office:value="1.36200556053582" calcext:value-type="float">
            <text:p>1,36201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22</text:p>
          </table:table-cell>
          <table:table-cell table:style-name="ce19" office:value-type="float" office:value="184.865724553711" calcext:value-type="float">
            <text:p>184,86572</text:p>
          </table:table-cell>
          <table:table-cell table:style-name="ce19" office:value-type="float" office:value="174.151049182324" calcext:value-type="float">
            <text:p>174,15105</text:p>
          </table:table-cell>
          <table:table-cell table:style-name="ce19" office:value-type="float" office:value="666.834199077417" calcext:value-type="float">
            <text:p>666,83420</text:p>
          </table:table-cell>
          <table:table-cell table:style-name="ce19" office:value-type="float" office:value="485.247958213396" calcext:value-type="float">
            <text:p>485,24796</text:p>
          </table:table-cell>
          <table:table-cell table:style-name="ce19" office:value-type="float" office:value="340.23293731918" calcext:value-type="float">
            <text:p>340,23294</text:p>
          </table:table-cell>
          <table:table-cell table:style-name="ce19" office:value-type="float" office:value="6329.28476007426" calcext:value-type="float">
            <text:p>6329,28476</text:p>
          </table:table-cell>
          <table:table-cell table:style-name="ce19" office:value-type="float" office:value="1.70925239411646" calcext:value-type="float">
            <text:p>1,70925</text:p>
          </table:table-cell>
          <table:table-cell table:style-name="ce19" office:value-type="float" office:value="0.924328622768556" calcext:value-type="float">
            <text:p>0,92433</text:p>
          </table:table-cell>
          <table:table-cell table:style-name="ce19" office:value-type="float" office:value="1.52708017540467" calcext:value-type="float">
            <text:p>1,52708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23</text:p>
          </table:table-cell>
          <table:table-cell table:style-name="ce19" office:value-type="float" office:value="266.908457515119" calcext:value-type="float">
            <text:p>266,90846</text:p>
          </table:table-cell>
          <table:table-cell table:style-name="ce19" office:value-type="float" office:value="275.437172961731" calcext:value-type="float">
            <text:p>275,43717</text:p>
          </table:table-cell>
          <table:table-cell table:style-name="ce19" office:value-type="float" office:value="579.273134593706" calcext:value-type="float">
            <text:p>579,27313</text:p>
          </table:table-cell>
          <table:table-cell table:style-name="ce19" office:value-type="float" office:value="705.38764621411" calcext:value-type="float">
            <text:p>705,38765</text:p>
          </table:table-cell>
          <table:table-cell table:style-name="ce19" office:value-type="float" office:value="494.133115624968" calcext:value-type="float">
            <text:p>494,13312</text:p>
          </table:table-cell>
          <table:table-cell table:style-name="ce19" office:value-type="float" office:value="9197.71132496743" calcext:value-type="float">
            <text:p>9197,71132</text:p>
          </table:table-cell>
          <table:table-cell table:style-name="ce19" office:value-type="float" office:value="2.45997176805695" calcext:value-type="float">
            <text:p>2,45997</text:p>
          </table:table-cell>
          <table:table-cell table:style-name="ce19" office:value-type="float" office:value="1.33454228757559" calcext:value-type="float">
            <text:p>1,33454</text:p>
          </table:table-cell>
          <table:table-cell table:style-name="ce19" office:value-type="float" office:value="2.19825894977808" calcext:value-type="float">
            <text:p>2,19826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R24</text:p>
          </table:table-cell>
          <table:table-cell table:style-name="ce19" office:value-type="float" office:value="12.9079351744975" calcext:value-type="float">
            <text:p>12,90794</text:p>
          </table:table-cell>
          <table:table-cell table:style-name="ce19" office:value-type="float" office:value="3.5204361838532" calcext:value-type="float">
            <text:p>3,52044</text:p>
          </table:table-cell>
          <table:table-cell table:style-name="ce19" office:value-type="float" office:value="13.8677776837918" calcext:value-type="float">
            <text:p>13,86778</text:p>
          </table:table-cell>
          <table:table-cell table:style-name="ce19" office:value-type="float" office:value="19.0099777990596" calcext:value-type="float">
            <text:p>19,00998</text:p>
          </table:table-cell>
          <table:table-cell table:style-name="ce19" office:value-type="float" office:value="13.31871857861" calcext:value-type="float">
            <text:p>13,31872</text:p>
          </table:table-cell>
          <table:table-cell table:style-name="ce19" office:value-type="float" office:value="249.756091348069" calcext:value-type="float">
            <text:p>249,75609</text:p>
          </table:table-cell>
          <table:table-cell table:style-name="ce19" office:value-type="float" office:value="0.0652512240621883" calcext:value-type="float">
            <text:p>0,06525</text:p>
          </table:table-cell>
          <table:table-cell table:style-name="ce19" office:value-type="float" office:value="0.0645396758724876" calcext:value-type="float">
            <text:p>0,06454</text:p>
          </table:table-cell>
          <table:table-cell table:style-name="ce19" office:value-type="float" office:value="0.0615470951487667" calcext:value-type="float">
            <text:p>0,06155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25</text:p>
          </table:table-cell>
          <table:table-cell table:style-name="ce19" office:value-type="float" office:value="87.9701607519417" calcext:value-type="float">
            <text:p>87,97016</text:p>
          </table:table-cell>
          <table:table-cell table:style-name="ce19" office:value-type="float" office:value="36.1964677328275" calcext:value-type="float">
            <text:p>36,19647</text:p>
          </table:table-cell>
          <table:table-cell table:style-name="ce19" office:value-type="float" office:value="686.526816607029" calcext:value-type="float">
            <text:p>686,52682</text:p>
          </table:table-cell>
          <table:table-cell table:style-name="ce19" office:value-type="float" office:value="192.593674488626" calcext:value-type="float">
            <text:p>192,59367</text:p>
          </table:table-cell>
          <table:table-cell table:style-name="ce19" office:value-type="float" office:value="135.534555172573" calcext:value-type="float">
            <text:p>135,53456</text:p>
          </table:table-cell>
          <table:table-cell table:style-name="ce19" office:value-type="float" office:value="2519.43853931073" calcext:value-type="float">
            <text:p>2519,43854</text:p>
          </table:table-cell>
          <table:table-cell table:style-name="ce19" office:value-type="float" office:value="0.70305848003962" calcext:value-type="float">
            <text:p>0,70306</text:p>
          </table:table-cell>
          <table:table-cell table:style-name="ce19" office:value-type="float" office:value="0.439850803759709" calcext:value-type="float">
            <text:p>0,43985</text:p>
          </table:table-cell>
          <table:table-cell table:style-name="ce19" office:value-type="float" office:value="0.63475437822854" calcext:value-type="float">
            <text:p>0,63475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R26</text:p>
          </table:table-cell>
          <table:table-cell table:style-name="ce19" office:value-type="float" office:value="55.6174319289805" calcext:value-type="float">
            <text:p>55,61743</text:p>
          </table:table-cell>
          <table:table-cell table:style-name="ce19" office:value-type="float" office:value="138.673533469228" calcext:value-type="float">
            <text:p>138,67353</text:p>
          </table:table-cell>
          <table:table-cell table:style-name="ce19" office:value-type="float" office:value="530.482762864596" calcext:value-type="float">
            <text:p>530,48276</text:p>
          </table:table-cell>
          <table:table-cell table:style-name="ce19" office:value-type="float" office:value="294.76775753055" calcext:value-type="float">
            <text:p>294,76776</text:p>
          </table:table-cell>
          <table:table-cell table:style-name="ce19" table:formula="of:=[.C56]+0.7*[.B56]+0.055*[.D56]" office:value-type="float" office:value="206.782287777067" calcext:value-type="float">
            <text:p>206,78229</text:p>
          </table:table-cell>
          <table:table-cell table:style-name="ce19" table:formula="of:=[.D56]+13.24*[.B56]+18.46*[.C56]" office:value-type="float" office:value="3826.77098944624" calcext:value-type="float">
            <text:p>3826,77099</text:p>
          </table:table-cell>
          <table:table-cell table:style-name="ce19" table:formula="of:=[.B56]/300+[.C56]/200+[.D56]/3000" office:value-type="float" office:value="1.05558669473094" calcext:value-type="float">
            <text:p>1,05559</text:p>
          </table:table-cell>
          <table:table-cell table:style-name="ce19" table:formula="of:=[.B56]/200" office:value-type="float" office:value="0.278087159644903" calcext:value-type="float">
            <text:p>0,27809</text:p>
          </table:table-cell>
          <table:table-cell table:style-name="ce19" table:formula="of:=[.B56]/360+[.C56]/240+[.D56]/3600" office:value-type="float" office:value="0.879655578942448" calcext:value-type="float">
            <text:p>0,87966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AR27</text:p>
          </table:table-cell>
          <table:table-cell table:style-name="ce20" office:value-type="float" office:value="248.294225727195" calcext:value-type="float">
            <text:p>248,29423</text:p>
          </table:table-cell>
          <table:table-cell table:style-name="ce20" office:value-type="float" office:value="702.128339245144" calcext:value-type="float">
            <text:p>702,12834</text:p>
          </table:table-cell>
          <table:table-cell table:style-name="ce20" office:value-type="float" office:value="557.153026902359" calcext:value-type="float">
            <text:p>557,15303</text:p>
          </table:table-cell>
          <table:table-cell table:style-name="ce20" office:value-type="float" office:value="1295.23853391923" calcext:value-type="float">
            <text:p>1295,23853</text:p>
          </table:table-cell>
          <table:table-cell table:style-name="ce20" table:formula="of:=[.C57]+0.7*[.B57]+0.055*[.D57]" office:value-type="float" office:value="906.57771373381" calcext:value-type="float">
            <text:p>906,57771</text:p>
          </table:table-cell>
          <table:table-cell table:style-name="ce20" table:formula="of:=[.D57]+13.24*[.B57]+18.46*[.C57]" office:value-type="float" office:value="16805.8577179958" calcext:value-type="float">
            <text:p>16805,85772</text:p>
          </table:table-cell>
          <table:table-cell table:style-name="ce20" table:formula="of:=[.B57]/300+[.C57]/200+[.D57]/3000" office:value-type="float" office:value="4.52400679095049" calcext:value-type="float">
            <text:p>4,52401</text:p>
          </table:table-cell>
          <table:table-cell table:style-name="ce20" table:formula="of:=[.B57]/200" office:value-type="float" office:value="1.24147112863597" calcext:value-type="float">
            <text:p>1,24147</text:p>
          </table:table-cell>
          <table:table-cell table:style-name="ce20" table:formula="of:=[.B57]/360+[.C57]/240+[.D57]/3600" office:value-type="float" office:value="3.77000565912541" calcext:value-type="float">
            <text:p>3,77001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19" office:value-type="float" office:value="94.1122451077939" calcext:value-type="float">
            <text:p>94,11225</text:p>
          </table:table-cell>
          <table:table-cell table:style-name="ce19" office:value-type="float" office:value="23.8251114893949" calcext:value-type="float">
            <text:p>23,82511</text:p>
          </table:table-cell>
          <table:table-cell table:style-name="ce19" office:value-type="float" office:value="82.6385057690048" calcext:value-type="float">
            <text:p>82,63851</text:p>
          </table:table-cell>
          <table:table-cell table:style-name="ce19" office:value-type="float" office:value="134.545319481842" calcext:value-type="float">
            <text:p>134,54532</text:p>
          </table:table-cell>
          <table:table-cell table:style-name="ce19" office:value-type="float" office:value="94.2488008821459" calcext:value-type="float">
            <text:p>94,24880</text:p>
          </table:table-cell>
          <table:table-cell table:style-name="ce19" office:value-type="float" office:value="1768.49618909043" calcext:value-type="float">
            <text:p>1768,49619</text:p>
          </table:table-cell>
          <table:table-cell table:style-name="ce19" office:value-type="float" office:value="0.460379209729289" calcext:value-type="float">
            <text:p>0,46038</text:p>
          </table:table-cell>
          <table:table-cell table:style-name="ce19" office:value-type="float" office:value="0.470561225538969" calcext:value-type="float">
            <text:p>0,47056</text:p>
          </table:table-cell>
          <table:table-cell table:style-name="ce19" office:value-type="float" office:value="0.435933922056515" calcext:value-type="float">
            <text:p>0,4359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19" office:value-type="float" office:value="174.882591622847" calcext:value-type="float">
            <text:p>174,88259</text:p>
          </table:table-cell>
          <table:table-cell table:style-name="ce19" office:value-type="float" office:value="43.0686140547632" calcext:value-type="float">
            <text:p>43,06861</text:p>
          </table:table-cell>
          <table:table-cell table:style-name="ce19" office:value-type="float" office:value="209.840548081057" calcext:value-type="float">
            <text:p>209,84055</text:p>
          </table:table-cell>
          <table:table-cell table:style-name="ce19" office:value-type="float" office:value="252.6284319234" calcext:value-type="float">
            <text:p>252,62843</text:p>
          </table:table-cell>
          <table:table-cell table:style-name="ce19" office:value-type="float" office:value="177.027658335214" calcext:value-type="float">
            <text:p>177,02766</text:p>
          </table:table-cell>
          <table:table-cell table:style-name="ce19" office:value-type="float" office:value="3320.33267661848" calcext:value-type="float">
            <text:p>3320,33268</text:p>
          </table:table-cell>
          <table:table-cell table:style-name="ce19" office:value-type="float" office:value="0.868231891710325" calcext:value-type="float">
            <text:p>0,86823</text:p>
          </table:table-cell>
          <table:table-cell table:style-name="ce19" office:value-type="float" office:value="0.874412958114235" calcext:value-type="float">
            <text:p>0,87441</text:p>
          </table:table-cell>
          <table:table-cell table:style-name="ce19" office:value-type="float" office:value="0.820683571771297" calcext:value-type="float">
            <text:p>0,820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19" office:value-type="float" office:value="85.4173205928975" calcext:value-type="float">
            <text:p>85,41732</text:p>
          </table:table-cell>
          <table:table-cell table:style-name="ce19" office:value-type="float" office:value="25.7137888832319" calcext:value-type="float">
            <text:p>25,71379</text:p>
          </table:table-cell>
          <table:table-cell table:style-name="ce19" office:value-type="float" office:value="107.377732857944" calcext:value-type="float">
            <text:p>107,37773</text:p>
          </table:table-cell>
          <table:table-cell table:style-name="ce19" office:value-type="float" office:value="130.456124125981" calcext:value-type="float">
            <text:p>130,45612</text:p>
          </table:table-cell>
          <table:table-cell table:style-name="ce19" office:value-type="float" office:value="91.4116886054471" calcext:value-type="float">
            <text:p>91,41169</text:p>
          </table:table-cell>
          <table:table-cell table:style-name="ce19" office:value-type="float" office:value="1712.97960029237" calcext:value-type="float">
            <text:p>1712,97960</text:p>
          </table:table-cell>
          <table:table-cell table:style-name="ce19" office:value-type="float" office:value="0.449085924011799" calcext:value-type="float">
            <text:p>0,44909</text:p>
          </table:table-cell>
          <table:table-cell table:style-name="ce19" office:value-type="float" office:value="0.427086602964488" calcext:value-type="float">
            <text:p>0,42709</text:p>
          </table:table-cell>
          <table:table-cell table:style-name="ce19" office:value-type="float" office:value="0.421692337005887" calcext:value-type="float">
            <text:p>0,42169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19" office:value-type="float" office:value="91.4111553526703" calcext:value-type="float">
            <text:p>91,41116</text:p>
          </table:table-cell>
          <table:table-cell table:style-name="ce19" office:value-type="float" office:value="24.8601055102109" calcext:value-type="float">
            <text:p>24,86011</text:p>
          </table:table-cell>
          <table:table-cell table:style-name="ce19" office:value-type="float" office:value="123.149207496554" calcext:value-type="float">
            <text:p>123,14921</text:p>
          </table:table-cell>
          <table:table-cell table:style-name="ce19" office:value-type="float" office:value="136.443595209507" calcext:value-type="float">
            <text:p>136,44360</text:p>
          </table:table-cell>
          <table:table-cell table:style-name="ce19" office:value-type="float" office:value="95.6211206693906" calcext:value-type="float">
            <text:p>95,62112</text:p>
          </table:table-cell>
          <table:table-cell table:style-name="ce19" office:value-type="float" office:value="1792.3504520844" calcext:value-type="float">
            <text:p>1792,35045</text:p>
          </table:table-cell>
          <table:table-cell table:style-name="ce19" office:value-type="float" office:value="0.470054114558807" calcext:value-type="float">
            <text:p>0,47005</text:p>
          </table:table-cell>
          <table:table-cell table:style-name="ce19" office:value-type="float" office:value="0.457055776763352" calcext:value-type="float">
            <text:p>0,45706</text:p>
          </table:table-cell>
          <table:table-cell table:style-name="ce19" office:value-type="float" office:value="0.442495737328267" calcext:value-type="float">
            <text:p>0,44250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19" office:value-type="float" office:value="88.8221065424112" calcext:value-type="float">
            <text:p>88,82211</text:p>
          </table:table-cell>
          <table:table-cell table:style-name="ce19" office:value-type="float" office:value="29.9718045880804" calcext:value-type="float">
            <text:p>29,97180</text:p>
          </table:table-cell>
          <table:table-cell table:style-name="ce19" office:value-type="float" office:value="104.2527031103" calcext:value-type="float">
            <text:p>104,25270</text:p>
          </table:table-cell>
          <table:table-cell table:style-name="ce19" office:value-type="float" office:value="139.709245242859" calcext:value-type="float">
            <text:p>139,70925</text:p>
          </table:table-cell>
          <table:table-cell table:style-name="ce19" office:value-type="float" office:value="97.8811778388348" calcext:value-type="float">
            <text:p>97,88118</text:p>
          </table:table-cell>
          <table:table-cell table:style-name="ce19" office:value-type="float" office:value="1833.53690642779" calcext:value-type="float">
            <text:p>1833,53691</text:p>
          </table:table-cell>
          <table:table-cell table:style-name="ce19" office:value-type="float" office:value="0.480683612451873" calcext:value-type="float">
            <text:p>0,48068</text:p>
          </table:table-cell>
          <table:table-cell table:style-name="ce19" office:value-type="float" office:value="0.444110532712056" calcext:value-type="float">
            <text:p>0,44411</text:p>
          </table:table-cell>
          <table:table-cell table:style-name="ce19" office:value-type="float" office:value="0.449915291789011" calcext:value-type="float">
            <text:p>0,44992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19" office:value-type="float" office:value="89.5333861710499" calcext:value-type="float">
            <text:p>89,53339</text:p>
          </table:table-cell>
          <table:table-cell table:style-name="ce19" office:value-type="float" office:value="35.9417131299116" calcext:value-type="float">
            <text:p>35,94171</text:p>
          </table:table-cell>
          <table:table-cell table:style-name="ce19" office:value-type="float" office:value="117.175388151357" calcext:value-type="float">
            <text:p>117,17539</text:p>
          </table:table-cell>
          <table:table-cell table:style-name="ce19" office:value-type="float" office:value="149.952540834478" calcext:value-type="float">
            <text:p>149,95254</text:p>
          </table:table-cell>
          <table:table-cell table:style-name="ce19" office:value-type="float" office:value="105.059729797971" calcext:value-type="float">
            <text:p>105,05973</text:p>
          </table:table-cell>
          <table:table-cell table:style-name="ce19" office:value-type="float" office:value="1966.08144543422" calcext:value-type="float">
            <text:p>1966,08145</text:p>
          </table:table-cell>
          <table:table-cell table:style-name="ce19" office:value-type="float" office:value="0.517211648936843" calcext:value-type="float">
            <text:p>0,51721</text:p>
          </table:table-cell>
          <table:table-cell table:style-name="ce19" office:value-type="float" office:value="0.447666930855249" calcext:value-type="float">
            <text:p>0,44767</text:p>
          </table:table-cell>
          <table:table-cell table:style-name="ce19" office:value-type="float" office:value="0.480750477542397" calcext:value-type="float">
            <text:p>0,48075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19" office:value-type="float" office:value="82.4303299435119" calcext:value-type="float">
            <text:p>82,43033</text:p>
          </table:table-cell>
          <table:table-cell table:style-name="ce19" office:value-type="float" office:value="35.4566825975335" calcext:value-type="float">
            <text:p>35,45668</text:p>
          </table:table-cell>
          <table:table-cell table:style-name="ce19" office:value-type="float" office:value="111.476023384077" calcext:value-type="float">
            <text:p>111,47602</text:p>
          </table:table-cell>
          <table:table-cell table:style-name="ce19" office:value-type="float" office:value="141.717039858559" calcext:value-type="float">
            <text:p>141,71704</text:p>
          </table:table-cell>
          <table:table-cell table:style-name="ce19" office:value-type="float" office:value="99.2890948441161" calcext:value-type="float">
            <text:p>99,28909</text:p>
          </table:table-cell>
          <table:table-cell table:style-name="ce19" office:value-type="float" office:value="1857.38395258664" calcext:value-type="float">
            <text:p>1857,38395</text:p>
          </table:table-cell>
          <table:table-cell table:style-name="ce19" office:value-type="float" office:value="0.4892098539274" calcext:value-type="float">
            <text:p>0,48921</text:p>
          </table:table-cell>
          <table:table-cell table:style-name="ce19" office:value-type="float" office:value="0.41215164971756" calcext:value-type="float">
            <text:p>0,41215</text:p>
          </table:table-cell>
          <table:table-cell table:style-name="ce19" office:value-type="float" office:value="0.453469506019229" calcext:value-type="float">
            <text:p>0,45347</text:p>
          </table:table-cell>
          <table:table-cell table:style-name="ce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19" office:value-type="float" office:value="91.7131544447168" calcext:value-type="float">
            <text:p>91,71315</text:p>
          </table:table-cell>
          <table:table-cell table:style-name="ce19" office:value-type="float" office:value="36.1864299792778" calcext:value-type="float">
            <text:p>36,18643</text:p>
          </table:table-cell>
          <table:table-cell table:style-name="ce19" office:value-type="float" office:value="253.90551406723" calcext:value-type="float">
            <text:p>253,90551</text:p>
          </table:table-cell>
          <table:table-cell table:style-name="ce19" office:value-type="float" office:value="163.010473898261" calcext:value-type="float">
            <text:p>163,01047</text:p>
          </table:table-cell>
          <table:table-cell table:style-name="ce19" office:value-type="float" office:value="114.350441364277" calcext:value-type="float">
            <text:p>114,35044</text:p>
          </table:table-cell>
          <table:table-cell table:style-name="ce19" office:value-type="float" office:value="2136.18917633275" calcext:value-type="float">
            <text:p>2136,18918</text:p>
          </table:table-cell>
          <table:table-cell table:style-name="ce19" office:value-type="float" office:value="0.571277836067855" calcext:value-type="float">
            <text:p>0,57128</text:p>
          </table:table-cell>
          <table:table-cell table:style-name="ce19" office:value-type="float" office:value="0.458565772223584" calcext:value-type="float">
            <text:p>0,45857</text:p>
          </table:table-cell>
          <table:table-cell table:style-name="ce19" office:value-type="float" office:value="0.527016615859166" calcext:value-type="float">
            <text:p>0,52702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19" office:value-type="float" office:value="96.378160861471" calcext:value-type="float">
            <text:p>96,37816</text:p>
          </table:table-cell>
          <table:table-cell table:style-name="ce19" office:value-type="float" office:value="31.3421650599641" calcext:value-type="float">
            <text:p>31,34217</text:p>
          </table:table-cell>
          <table:table-cell table:style-name="ce19" office:value-type="float" office:value="189.74649715495" calcext:value-type="float">
            <text:p>189,74650</text:p>
          </table:table-cell>
          <table:table-cell table:style-name="ce19" office:value-type="float" office:value="155.807937178151" calcext:value-type="float">
            <text:p>155,80794</text:p>
          </table:table-cell>
          <table:table-cell table:style-name="ce19" office:value-type="float" office:value="109.242935006516" calcext:value-type="float">
            <text:p>109,24294</text:p>
          </table:table-cell>
          <table:table-cell table:style-name="ce19" office:value-type="float" office:value="2044.36971396776" calcext:value-type="float">
            <text:p>2044,36971</text:p>
          </table:table-cell>
          <table:table-cell table:style-name="ce19" office:value-type="float" office:value="0.541220193889707" calcext:value-type="float">
            <text:p>0,54122</text:p>
          </table:table-cell>
          <table:table-cell table:style-name="ce19" office:value-type="float" office:value="0.481890804307355" calcext:value-type="float">
            <text:p>0,48189</text:p>
          </table:table-cell>
          <table:table-cell table:style-name="ce19" office:value-type="float" office:value="0.50456025094224" calcext:value-type="float">
            <text:p>0,50456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19" office:value-type="float" office:value="94.6422047880665" calcext:value-type="float">
            <text:p>94,64220</text:p>
          </table:table-cell>
          <table:table-cell table:style-name="ce19" office:value-type="float" office:value="29.1386869181854" calcext:value-type="float">
            <text:p>29,13869</text:p>
          </table:table-cell>
          <table:table-cell table:style-name="ce19" office:value-type="float" office:value="199.575719498463" calcext:value-type="float">
            <text:p>199,57572</text:p>
          </table:table-cell>
          <table:table-cell table:style-name="ce19" office:value-type="float" office:value="151.677857482453" calcext:value-type="float">
            <text:p>151,67786</text:p>
          </table:table-cell>
          <table:table-cell table:style-name="ce19" office:value-type="float" office:value="106.364894842247" calcext:value-type="float">
            <text:p>106,36489</text:p>
          </table:table-cell>
          <table:table-cell table:style-name="ce19" office:value-type="float" office:value="1990.53867140217" calcext:value-type="float">
            <text:p>1990,53867</text:p>
          </table:table-cell>
          <table:table-cell table:style-name="ce19" office:value-type="float" office:value="0.52769269038397" calcext:value-type="float">
            <text:p>0,52769</text:p>
          </table:table-cell>
          <table:table-cell table:style-name="ce19" office:value-type="float" office:value="0.473211023940332" calcext:value-type="float">
            <text:p>0,47321</text:p>
          </table:table-cell>
          <table:table-cell table:style-name="ce19" office:value-type="float" office:value="0.492322911313345" calcext:value-type="float">
            <text:p>0,49232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19" office:value-type="float" office:value="77.2264692953094" calcext:value-type="float">
            <text:p>77,22647</text:p>
          </table:table-cell>
          <table:table-cell table:style-name="ce19" office:value-type="float" office:value="33.2640709885411" calcext:value-type="float">
            <text:p>33,26407</text:p>
          </table:table-cell>
          <table:table-cell table:style-name="ce19" office:value-type="float" office:value="213.00350815979" calcext:value-type="float">
            <text:p>213,00351</text:p>
          </table:table-cell>
          <table:table-cell table:style-name="ce19" office:value-type="float" office:value="141.195360937227" calcext:value-type="float">
            <text:p>141,19536</text:p>
          </table:table-cell>
          <table:table-cell table:style-name="ce19" office:value-type="float" office:value="99.0377924440461" calcext:value-type="float">
            <text:p>99,03779</text:p>
          </table:table-cell>
          <table:table-cell table:style-name="ce19" office:value-type="float" office:value="1849.53671207816" calcext:value-type="float">
            <text:p>1849,53671</text:p>
          </table:table-cell>
          <table:table-cell table:style-name="ce19" office:value-type="float" office:value="0.494743088647" calcext:value-type="float">
            <text:p>0,49474</text:p>
          </table:table-cell>
          <table:table-cell table:style-name="ce19" office:value-type="float" office:value="0.386132346476547" calcext:value-type="float">
            <text:p>0,38613</text:p>
          </table:table-cell>
          <table:table-cell table:style-name="ce19" office:value-type="float" office:value="0.455189501258783" calcext:value-type="float">
            <text:p>0,45519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19" office:value-type="float" office:value="41.2123179838298" calcext:value-type="float">
            <text:p>41,21232</text:p>
          </table:table-cell>
          <table:table-cell table:style-name="ce19" office:value-type="float" office:value="15.7354311039106" calcext:value-type="float">
            <text:p>15,73543</text:p>
          </table:table-cell>
          <table:table-cell table:style-name="ce19" office:value-type="float" office:value="211.67217531665" calcext:value-type="float">
            <text:p>211,67218</text:p>
          </table:table-cell>
          <table:table-cell table:style-name="ce19" office:value-type="float" office:value="80.0127419618041" calcext:value-type="float">
            <text:p>80,01274</text:p>
          </table:table-cell>
          <table:table-cell table:style-name="ce19" office:value-type="float" office:value="56.2260233350073" calcext:value-type="float">
            <text:p>56,22602</text:p>
          </table:table-cell>
          <table:table-cell table:style-name="ce19" office:value-type="float" office:value="1047.79932360075" calcext:value-type="float">
            <text:p>1047,79932</text:p>
          </table:table-cell>
          <table:table-cell table:style-name="ce19" office:value-type="float" office:value="0.286608940571203" calcext:value-type="float">
            <text:p>0,28661</text:p>
          </table:table-cell>
          <table:table-cell table:style-name="ce19" office:value-type="float" office:value="0.206061589919149" calcext:value-type="float">
            <text:p>0,20606</text:p>
          </table:table-cell>
          <table:table-cell table:style-name="ce19" office:value-type="float" office:value="0.261736516022574" calcext:value-type="float">
            <text:p>0,2617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19" office:value-type="float" office:value="70.0230371880554" calcext:value-type="float">
            <text:p>70,02304</text:p>
          </table:table-cell>
          <table:table-cell table:style-name="ce19" office:value-type="float" office:value="34.8574623715816" calcext:value-type="float">
            <text:p>34,85746</text:p>
          </table:table-cell>
          <table:table-cell table:style-name="ce19" office:value-type="float" office:value="221.456954487036" calcext:value-type="float">
            <text:p>221,45695</text:p>
          </table:table-cell>
          <table:table-cell table:style-name="ce19" office:value-type="float" office:value="136.921393874919" calcext:value-type="float">
            <text:p>136,92139</text:p>
          </table:table-cell>
          <table:table-cell table:style-name="ce19" office:value-type="float" office:value="96.0537209000074" calcext:value-type="float">
            <text:p>96,05372</text:p>
          </table:table-cell>
          <table:table-cell table:style-name="ce19" office:value-type="float" office:value="1792.03072223629" calcext:value-type="float">
            <text:p>1792,03072</text:p>
          </table:table-cell>
          <table:table-cell table:style-name="ce19" office:value-type="float" office:value="0.481516420647105" calcext:value-type="float">
            <text:p>0,48152</text:p>
          </table:table-cell>
          <table:table-cell table:style-name="ce19" office:value-type="float" office:value="0.350115185940277" calcext:value-type="float">
            <text:p>0,35012</text:p>
          </table:table-cell>
          <table:table-cell table:style-name="ce19" office:value-type="float" office:value="0.440165371199285" calcext:value-type="float">
            <text:p>0,440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19" office:value-type="float" office:value="100.917191636039" calcext:value-type="float">
            <text:p>100,91719</text:p>
          </table:table-cell>
          <table:table-cell table:style-name="ce19" office:value-type="float" office:value="36.4923084901962" calcext:value-type="float">
            <text:p>36,49231</text:p>
          </table:table-cell>
          <table:table-cell table:style-name="ce19" office:value-type="float" office:value="176.503725582384" calcext:value-type="float">
            <text:p>176,50373</text:p>
          </table:table-cell>
          <table:table-cell table:style-name="ce19" office:value-type="float" office:value="166.691979646863" calcext:value-type="float">
            <text:p>166,69198</text:p>
          </table:table-cell>
          <table:table-cell table:style-name="ce19" office:value-type="float" office:value="116.842047542455" calcext:value-type="float">
            <text:p>116,84205</text:p>
          </table:table-cell>
          <table:table-cell table:style-name="ce19" office:value-type="float" office:value="2186.29535757257" calcext:value-type="float">
            <text:p>2186,29536</text:p>
          </table:table-cell>
          <table:table-cell table:style-name="ce19" office:value-type="float" office:value="0.577686756431906" calcext:value-type="float">
            <text:p>0,57769</text:p>
          </table:table-cell>
          <table:table-cell table:style-name="ce19" office:value-type="float" office:value="0.504585958180196" calcext:value-type="float">
            <text:p>0,50459</text:p>
          </table:table-cell>
          <table:table-cell table:style-name="ce19" office:value-type="float" office:value="0.537470736824388" calcext:value-type="float">
            <text:p>0,5374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19" office:value-type="float" office:value="84.4539451075858" calcext:value-type="float">
            <text:p>84,45395</text:p>
          </table:table-cell>
          <table:table-cell table:style-name="ce19" office:value-type="float" office:value="29.4932327940565" calcext:value-type="float">
            <text:p>29,49323</text:p>
          </table:table-cell>
          <table:table-cell table:style-name="ce19" office:value-type="float" office:value="118.340073349997" calcext:value-type="float">
            <text:p>118,34007</text:p>
          </table:table-cell>
          <table:table-cell table:style-name="ce19" office:value-type="float" office:value="135.741453651036" calcext:value-type="float">
            <text:p>135,74145</text:p>
          </table:table-cell>
          <table:table-cell table:style-name="ce19" office:value-type="float" office:value="95.1196984036164" calcext:value-type="float">
            <text:p>95,11970</text:p>
          </table:table-cell>
          <table:table-cell table:style-name="ce19" office:value-type="float" office:value="1780.95538395272" calcext:value-type="float">
            <text:p>1780,95538</text:p>
          </table:table-cell>
          <table:table-cell table:style-name="ce19" office:value-type="float" office:value="0.468426005445567" calcext:value-type="float">
            <text:p>0,46843</text:p>
          </table:table-cell>
          <table:table-cell table:style-name="ce19" office:value-type="float" office:value="0.422269725537929" calcext:value-type="float">
            <text:p>0,42227</text:p>
          </table:table-cell>
          <table:table-cell table:style-name="ce19" office:value-type="float" office:value="0.437273862931076" calcext:value-type="float">
            <text:p>0,43727</text:p>
          </table:table-cell>
          <table:table-cell table:style-name="ce14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16</text:p>
          </table:table-cell>
          <table:table-cell table:style-name="ce19" office:value-type="float" office:value="115.72960181966" calcext:value-type="float">
            <text:p>115,72960</text:p>
          </table:table-cell>
          <table:table-cell table:style-name="ce19" office:value-type="float" office:value="39.4855136275358" calcext:value-type="float">
            <text:p>39,48551</text:p>
          </table:table-cell>
          <table:table-cell table:style-name="ce19" office:value-type="float" office:value="142.753453490882" calcext:value-type="float">
            <text:p>142,75345</text:p>
          </table:table-cell>
          <table:table-cell table:style-name="ce19" office:value-type="float" office:value="183.185902225835" calcext:value-type="float">
            <text:p>183,18590</text:p>
          </table:table-cell>
          <table:table-cell table:style-name="ce19" office:value-type="float" office:value="128.347674843297" calcext:value-type="float">
            <text:p>128,34767</text:p>
          </table:table-cell>
          <table:table-cell table:style-name="ce19" office:value-type="float" office:value="2403.9159631475" calcext:value-type="float">
            <text:p>2403,91596</text:p>
          </table:table-cell>
          <table:table-cell table:style-name="ce19" office:value-type="float" office:value="0.630777392033508" calcext:value-type="float">
            <text:p>0,63078</text:p>
          </table:table-cell>
          <table:table-cell table:style-name="ce19" office:value-type="float" office:value="0.578648009098302" calcext:value-type="float">
            <text:p>0,57865</text:p>
          </table:table-cell>
          <table:table-cell table:style-name="ce19" office:value-type="float" office:value="0.589942049927735" calcext:value-type="float">
            <text:p>0,5899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7</text:p>
          </table:table-cell>
          <table:table-cell table:style-name="ce19" office:value-type="float" office:value="100.746102269808" calcext:value-type="float">
            <text:p>100,74610</text:p>
          </table:table-cell>
          <table:table-cell table:style-name="ce19" office:value-type="float" office:value="43.4351766469217" calcext:value-type="float">
            <text:p>43,43518</text:p>
          </table:table-cell>
          <table:table-cell table:style-name="ce19" office:value-type="float" office:value="111.937868335275" calcext:value-type="float">
            <text:p>111,93787</text:p>
          </table:table-cell>
          <table:table-cell table:style-name="ce19" office:value-type="float" office:value="171.477620736722" calcext:value-type="float">
            <text:p>171,47762</text:p>
          </table:table-cell>
          <table:table-cell table:style-name="ce19" office:value-type="float" office:value="120.114030994227" calcext:value-type="float">
            <text:p>120,11403</text:p>
          </table:table-cell>
          <table:table-cell table:style-name="ce19" office:value-type="float" office:value="2247.62962328971" calcext:value-type="float">
            <text:p>2247,62962</text:p>
          </table:table-cell>
          <table:table-cell table:style-name="ce19" office:value-type="float" office:value="0.590308846912393" calcext:value-type="float">
            <text:p>0,59031</text:p>
          </table:table-cell>
          <table:table-cell table:style-name="ce19" office:value-type="float" office:value="0.503730511349039" calcext:value-type="float">
            <text:p>0,50373</text:p>
          </table:table-cell>
          <table:table-cell table:style-name="ce19" office:value-type="float" office:value="0.547894095910221" calcext:value-type="float">
            <text:p>0,54789</text:p>
          </table:table-cell>
          <table:table-cell table:style-name="ce14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18</text:p>
          </table:table-cell>
          <table:table-cell table:style-name="ce19" office:value-type="float" office:value="82.5881560164252" calcext:value-type="float">
            <text:p>82,58816</text:p>
          </table:table-cell>
          <table:table-cell table:style-name="ce19" office:value-type="float" office:value="28.2294921765407" calcext:value-type="float">
            <text:p>28,22949</text:p>
          </table:table-cell>
          <table:table-cell table:style-name="ce19" office:value-type="float" office:value="198.049660341933" calcext:value-type="float">
            <text:p>198,04966</text:p>
          </table:table-cell>
          <table:table-cell table:style-name="ce19" office:value-type="float" office:value="138.206153675207" calcext:value-type="float">
            <text:p>138,20615</text:p>
          </table:table-cell>
          <table:table-cell table:style-name="ce19" office:value-type="float" office:value="96.9339327068447" calcext:value-type="float">
            <text:p>96,93393</text:p>
          </table:table-cell>
          <table:table-cell table:style-name="ce19" office:value-type="float" office:value="1812.63327157835" calcext:value-type="float">
            <text:p>1812,63327</text:p>
          </table:table-cell>
          <table:table-cell table:style-name="ce19" office:value-type="float" office:value="0.482457867718099" calcext:value-type="float">
            <text:p>0,48246</text:p>
          </table:table-cell>
          <table:table-cell table:style-name="ce19" office:value-type="float" office:value="0.412940780082126" calcext:value-type="float">
            <text:p>0,41294</text:p>
          </table:table-cell>
          <table:table-cell table:style-name="ce19" office:value-type="float" office:value="0.44793053199643" calcext:value-type="float">
            <text:p>0,44793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A19</text:p>
          </table:table-cell>
          <table:table-cell table:style-name="ce19" office:value-type="float" office:value="30.6451941762596" calcext:value-type="float">
            <text:p>30,64519</text:p>
          </table:table-cell>
          <table:table-cell table:style-name="ce19" office:value-type="float" office:value="16.0958681601254" calcext:value-type="float">
            <text:p>16,09587</text:p>
          </table:table-cell>
          <table:table-cell table:style-name="ce19" office:value-type="float" office:value="292.033016642262" calcext:value-type="float">
            <text:p>292,03302</text:p>
          </table:table-cell>
          <table:table-cell table:style-name="ce19" office:value-type="float" office:value="76.1488279266931" calcext:value-type="float">
            <text:p>76,14883</text:p>
          </table:table-cell>
          <table:table-cell table:style-name="ce19" office:value-type="float" office:value="53.6093199988315" calcext:value-type="float">
            <text:p>53,60932</text:p>
          </table:table-cell>
          <table:table-cell table:style-name="ce19" office:value-type="float" office:value="994.905113771854" calcext:value-type="float">
            <text:p>994,90511</text:p>
          </table:table-cell>
          <table:table-cell table:style-name="ce19" office:value-type="float" office:value="0.27997432693558" calcext:value-type="float">
            <text:p>0,27997</text:p>
          </table:table-cell>
          <table:table-cell table:style-name="ce19" office:value-type="float" office:value="0.153225970881298" calcext:value-type="float">
            <text:p>0,15323</text:p>
          </table:table-cell>
          <table:table-cell table:style-name="ce19" office:value-type="float" office:value="0.250337046988683" calcext:value-type="float">
            <text:p>0,25034</text:p>
          </table:table-cell>
          <table:table-cell table:style-name="ce9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A20</text:p>
          </table:table-cell>
          <table:table-cell table:style-name="ce19" office:value-type="float" office:value="105.73623042977" calcext:value-type="float">
            <text:p>105,73623</text:p>
          </table:table-cell>
          <table:table-cell table:style-name="ce19" office:value-type="float" office:value="36.7958217735831" calcext:value-type="float">
            <text:p>36,79582</text:p>
          </table:table-cell>
          <table:table-cell table:style-name="ce19" office:value-type="float" office:value="133.73893986708" calcext:value-type="float">
            <text:p>133,73894</text:p>
          </table:table-cell>
          <table:table-cell table:style-name="ce19" office:value-type="float" office:value="168.652153935759" calcext:value-type="float">
            <text:p>168,65215</text:p>
          </table:table-cell>
          <table:table-cell table:style-name="ce19" office:value-type="float" office:value="118.166824767111" calcext:value-type="float">
            <text:p>118,16682</text:p>
          </table:table-cell>
          <table:table-cell table:style-name="ce19" office:value-type="float" office:value="2212.93750069757" calcext:value-type="float">
            <text:p>2212,93750</text:p>
          </table:table-cell>
          <table:table-cell table:style-name="ce19" office:value-type="float" office:value="0.581012856922841" calcext:value-type="float">
            <text:p>0,58101</text:p>
          </table:table-cell>
          <table:table-cell table:style-name="ce19" office:value-type="float" office:value="0.528681152148849" calcext:value-type="float">
            <text:p>0,52868</text:p>
          </table:table-cell>
          <table:table-cell table:style-name="ce19" office:value-type="float" office:value="0.542919731007795" calcext:value-type="float">
            <text:p>0,5429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21</text:p>
          </table:table-cell>
          <table:table-cell table:style-name="ce19" office:value-type="float" office:value="25.659620809842" calcext:value-type="float">
            <text:p>25,65962</text:p>
          </table:table-cell>
          <table:table-cell table:style-name="ce19" office:value-type="float" office:value="23.1579141767744" calcext:value-type="float">
            <text:p>23,15791</text:p>
          </table:table-cell>
          <table:table-cell table:style-name="ce19" office:value-type="float" office:value="220.313783355663" calcext:value-type="float">
            <text:p>220,31378</text:p>
          </table:table-cell>
          <table:table-cell table:style-name="ce19" office:value-type="float" office:value="75.7395994010154" calcext:value-type="float">
            <text:p>75,73960</text:p>
          </table:table-cell>
          <table:table-cell table:style-name="ce19" table:formula="of:=[.C78]+0.7*[.B78]+0.055*[.D78]" office:value-type="float" office:value="53.2369068282253" calcext:value-type="float">
            <text:p>53,23691</text:p>
          </table:table-cell>
          <table:table-cell table:style-name="ce19" table:formula="of:=[.D78]+13.24*[.B78]+18.46*[.C78]" office:value-type="float" office:value="987.542258581226" calcext:value-type="float">
            <text:p>987,54226</text:p>
          </table:table-cell>
          <table:table-cell table:style-name="ce19" table:formula="of:=[.B78]/300+[.C78]/200+[.D78]/3000" office:value-type="float" office:value="0.274759568035233" calcext:value-type="float">
            <text:p>0,27476</text:p>
          </table:table-cell>
          <table:table-cell table:style-name="ce19" table:formula="of:=[.B78]/200" office:value-type="float" office:value="0.12829810404921" calcext:value-type="float">
            <text:p>0,12830</text:p>
          </table:table-cell>
          <table:table-cell table:style-name="ce19" table:formula="of:=[.B78]/360+[.C78]/240+[.D78]/3600" office:value-type="float" office:value="0.228966306696027" calcext:value-type="float">
            <text:p>0,2289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22</text:p>
          </table:table-cell>
          <table:table-cell table:style-name="ce19" office:value-type="float" office:value="25.5232015792693" calcext:value-type="float">
            <text:p>25,52320</text:p>
          </table:table-cell>
          <table:table-cell table:style-name="ce19" office:value-type="float" office:value="15.7876792437676" calcext:value-type="float">
            <text:p>15,78768</text:p>
          </table:table-cell>
          <table:table-cell table:style-name="ce19" office:value-type="float" office:value="282.904186599402" calcext:value-type="float">
            <text:p>282,90419</text:p>
          </table:table-cell>
          <table:table-cell table:style-name="ce19" office:value-type="float" office:value="69.883205266011" calcext:value-type="float">
            <text:p>69,88321</text:p>
          </table:table-cell>
          <table:table-cell table:style-name="ce19" table:formula="of:=[.C79]+0.7*[.B79]+0.055*[.D79]" office:value-type="float" office:value="49.2136506122233" calcext:value-type="float">
            <text:p>49,21365</text:p>
          </table:table-cell>
          <table:table-cell table:style-name="ce19" table:formula="of:=[.D79]+13.24*[.B79]+18.46*[.C79]" office:value-type="float" office:value="912.271934348878" calcext:value-type="float">
            <text:p>912,27193</text:p>
          </table:table-cell>
          <table:table-cell table:style-name="ce19" table:formula="of:=[.B79]/300+[.C79]/200+[.D79]/3000" office:value-type="float" office:value="0.258317130349536" calcext:value-type="float">
            <text:p>0,25832</text:p>
          </table:table-cell>
          <table:table-cell table:style-name="ce19" table:formula="of:=[.B79]/200" office:value-type="float" office:value="0.127616007896347" calcext:value-type="float">
            <text:p>0,12762</text:p>
          </table:table-cell>
          <table:table-cell table:style-name="ce19" table:formula="of:=[.B79]/360+[.C79]/240+[.D79]/3600" office:value-type="float" office:value="0.21526427529128" calcext:value-type="float">
            <text:p>0,2152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23</text:p>
          </table:table-cell>
          <table:table-cell table:style-name="ce20" office:value-type="float" office:value="83.8434256135627" calcext:value-type="float">
            <text:p>83,84343</text:p>
          </table:table-cell>
          <table:table-cell table:style-name="ce20" office:value-type="float" office:value="23.849894232552" calcext:value-type="float">
            <text:p>23,84989</text:p>
          </table:table-cell>
          <table:table-cell table:style-name="ce20" office:value-type="float" office:value="122.044487473089" calcext:value-type="float">
            <text:p>122,04449</text:p>
          </table:table-cell>
          <table:table-cell table:style-name="ce20" office:value-type="float" office:value="127.34619990154" calcext:value-type="float">
            <text:p>127,34620</text:p>
          </table:table-cell>
          <table:table-cell table:style-name="ce20" table:formula="of:=[.C80]+0.7*[.B80]+0.055*[.D80]" office:value-type="float" office:value="89.2527389730658" calcext:value-type="float">
            <text:p>89,25274</text:p>
          </table:table-cell>
          <table:table-cell table:style-name="ce20" table:formula="of:=[.D80]+13.24*[.B80]+18.46*[.C80]" office:value-type="float" office:value="1672.40049012957" calcext:value-type="float">
            <text:p>1672,40049</text:p>
          </table:table-cell>
          <table:table-cell table:style-name="ce20" table:formula="of:=[.B80]/300+[.C80]/200+[.D80]/3000" office:value-type="float" office:value="0.439409052365665" calcext:value-type="float">
            <text:p>0,43941</text:p>
          </table:table-cell>
          <table:table-cell table:style-name="ce20" table:formula="of:=[.B80]/200" office:value-type="float" office:value="0.419217128067814" calcext:value-type="float">
            <text:p>0,41922</text:p>
          </table:table-cell>
          <table:table-cell table:style-name="ce20" table:formula="of:=[.B80]/360+[.C80]/240+[.D80]/3600" office:value-type="float" office:value="0.366174210304721" calcext:value-type="float">
            <text:p>0,366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19" office:value-type="float" office:value="106.496383957685" calcext:value-type="float">
            <text:p>106,49638</text:p>
          </table:table-cell>
          <table:table-cell table:style-name="ce19" office:value-type="float" office:value="50.0777429191353" calcext:value-type="float">
            <text:p>50,07774</text:p>
          </table:table-cell>
          <table:table-cell table:style-name="ce19" office:value-type="float" office:value="955.406548250218" calcext:value-type="float">
            <text:p>955,40655</text:p>
          </table:table-cell>
          <table:table-cell table:style-name="ce19" office:value-type="float" office:value="251.673860547315" calcext:value-type="float">
            <text:p>251,67386</text:p>
          </table:table-cell>
          <table:table-cell table:style-name="ce19" office:value-type="float" office:value="177.172571843277" calcext:value-type="float">
            <text:p>177,17257</text:p>
          </table:table-cell>
          <table:table-cell table:style-name="ce19" office:value-type="float" office:value="2224.88996656036" calcext:value-type="float">
            <text:p>2224,88997</text:p>
          </table:table-cell>
          <table:table-cell table:style-name="ce19" office:value-type="float" office:value="0.923845510538033" calcext:value-type="float">
            <text:p>0,92385</text:p>
          </table:table-cell>
          <table:table-cell table:style-name="ce19" office:value-type="float" office:value="0.532481919788426" calcext:value-type="float">
            <text:p>0,53248</text:p>
          </table:table-cell>
          <table:table-cell table:style-name="ce19" office:value-type="float" office:value="0.829035916535963" calcext:value-type="float">
            <text:p>0,8290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19" office:value-type="float" office:value="97.5296485855231" calcext:value-type="float">
            <text:p>97,52965</text:p>
          </table:table-cell>
          <table:table-cell table:style-name="ce19" office:value-type="float" office:value="74.7851376838949" calcext:value-type="float">
            <text:p>74,78514</text:p>
          </table:table-cell>
          <table:table-cell table:style-name="ce19" office:value-type="float" office:value="874.875082384101" calcext:value-type="float">
            <text:p>874,87508</text:p>
          </table:table-cell>
          <table:table-cell table:style-name="ce19" office:value-type="float" office:value="271.837776817068" calcext:value-type="float">
            <text:p>271,83778</text:p>
          </table:table-cell>
          <table:table-cell table:style-name="ce19" office:value-type="float" office:value="191.174021224887" calcext:value-type="float">
            <text:p>191,17402</text:p>
          </table:table-cell>
          <table:table-cell table:style-name="ce19" office:value-type="float" office:value="2571.40478544589" calcext:value-type="float">
            <text:p>2571,40479</text:p>
          </table:table-cell>
          <table:table-cell table:style-name="ce19" office:value-type="float" office:value="0.990649544499252" calcext:value-type="float">
            <text:p>0,99065</text:p>
          </table:table-cell>
          <table:table-cell table:style-name="ce19" office:value-type="float" office:value="0.487648242927616" calcext:value-type="float">
            <text:p>0,48765</text:p>
          </table:table-cell>
          <table:table-cell table:style-name="ce19" office:value-type="float" office:value="0.879724425185778" calcext:value-type="float">
            <text:p>0,8797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B3</text:p>
          </table:table-cell>
          <table:table-cell table:style-name="ce19" office:value-type="float" office:value="112.119544609033" calcext:value-type="float">
            <text:p>112,11954</text:p>
          </table:table-cell>
          <table:table-cell table:style-name="ce19" office:value-type="float" office:value="69.6878621380064" calcext:value-type="float">
            <text:p>69,68786</text:p>
          </table:table-cell>
          <table:table-cell table:style-name="ce19" office:value-type="float" office:value="1001.32211280083" calcext:value-type="float">
            <text:p>1001,32211</text:p>
          </table:table-cell>
          <table:table-cell table:style-name="ce19" office:value-type="float" office:value="288.874990152047" calcext:value-type="float">
            <text:p>288,87499</text:p>
          </table:table-cell>
          <table:table-cell table:style-name="ce19" office:value-type="float" office:value="203.244259568376" calcext:value-type="float">
            <text:p>203,24426</text:p>
          </table:table-cell>
          <table:table-cell table:style-name="ce19" office:value-type="float" office:value="2651.0273724017" calcext:value-type="float">
            <text:p>2651,02737</text:p>
          </table:table-cell>
          <table:table-cell table:style-name="ce19" office:value-type="float" office:value="1.05594516365375" calcext:value-type="float">
            <text:p>1,05595</text:p>
          </table:table-cell>
          <table:table-cell table:style-name="ce19" office:value-type="float" office:value="0.560597723045167" calcext:value-type="float">
            <text:p>0,56060</text:p>
          </table:table-cell>
          <table:table-cell table:style-name="ce19" office:value-type="float" office:value="0.942242938938702" calcext:value-type="float">
            <text:p>0,94224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4</text:p>
          </table:table-cell>
          <table:table-cell table:style-name="ce19" office:value-type="float" office:value="134.343167621839" calcext:value-type="float">
            <text:p>134,34317</text:p>
          </table:table-cell>
          <table:table-cell table:style-name="ce19" office:value-type="float" office:value="60.0139831872271" calcext:value-type="float">
            <text:p>60,01398</text:p>
          </table:table-cell>
          <table:table-cell table:style-name="ce19" office:value-type="float" office:value="917.012812587184" calcext:value-type="float">
            <text:p>917,01281</text:p>
          </table:table-cell>
          <table:table-cell table:style-name="ce19" office:value-type="float" office:value="290.773150148787" calcext:value-type="float">
            <text:p>290,77315</text:p>
          </table:table-cell>
          <table:table-cell table:style-name="ce19" office:value-type="float" office:value="204.48990521481" calcext:value-type="float">
            <text:p>204,48991</text:p>
          </table:table-cell>
          <table:table-cell table:style-name="ce19" office:value-type="float" office:value="2460.14280531815" calcext:value-type="float">
            <text:p>2460,14281</text:p>
          </table:table-cell>
          <table:table-cell table:style-name="ce19" office:value-type="float" office:value="1.05355141220466" calcext:value-type="float">
            <text:p>1,05355</text:p>
          </table:table-cell>
          <table:table-cell table:style-name="ce19" office:value-type="float" office:value="0.671715838109196" calcext:value-type="float">
            <text:p>0,67172</text:p>
          </table:table-cell>
          <table:table-cell table:style-name="ce19" office:value-type="float" office:value="0.952594603293795" calcext:value-type="float">
            <text:p>0,9525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19" office:value-type="float" office:value="69.43" calcext:value-type="float">
            <text:p>69,43000</text:p>
          </table:table-cell>
          <table:table-cell table:style-name="ce19" office:value-type="float" office:value="48.15" calcext:value-type="float">
            <text:p>48,15000</text:p>
          </table:table-cell>
          <table:table-cell table:style-name="ce19" office:value-type="float" office:value="1077.56" calcext:value-type="float">
            <text:p>1077,56000</text:p>
          </table:table-cell>
          <table:table-cell table:style-name="ce19" office:value-type="float" office:value="221.25662" calcext:value-type="float">
            <text:p>221,25662</text:p>
          </table:table-cell>
          <table:table-cell table:style-name="ce19" office:value-type="float" office:value="156.0168" calcext:value-type="float">
            <text:p>156,01680</text:p>
          </table:table-cell>
          <table:table-cell table:style-name="ce19" office:value-type="float" office:value="2191.3622" calcext:value-type="float">
            <text:p>2191,36220</text:p>
          </table:table-cell>
          <table:table-cell table:style-name="ce19" office:value-type="float" office:value="0.83137" calcext:value-type="float">
            <text:p>0,83137</text:p>
          </table:table-cell>
          <table:table-cell table:style-name="ce19" office:value-type="float" office:value="0.34715" calcext:value-type="float">
            <text:p>0,34715</text:p>
          </table:table-cell>
          <table:table-cell table:style-name="ce19" office:value-type="float" office:value="0.731380555555556" calcext:value-type="float">
            <text:p>0,73138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6</text:p>
          </table:table-cell>
          <table:table-cell table:style-name="ce19" office:value-type="float" office:value="61.55" calcext:value-type="float">
            <text:p>61,55000</text:p>
          </table:table-cell>
          <table:table-cell table:style-name="ce19" office:value-type="float" office:value="59.08" calcext:value-type="float">
            <text:p>59,08000</text:p>
          </table:table-cell>
          <table:table-cell table:style-name="ce19" office:value-type="float" office:value="859.27" calcext:value-type="float">
            <text:p>859,27000</text:p>
          </table:table-cell>
          <table:table-cell table:style-name="ce19" office:value-type="float" office:value="212.19819" calcext:value-type="float">
            <text:p>212,19819</text:p>
          </table:table-cell>
          <table:table-cell table:style-name="ce19" office:value-type="float" office:value="149.42485" calcext:value-type="float">
            <text:p>149,42485</text:p>
          </table:table-cell>
          <table:table-cell table:style-name="ce19" office:value-type="float" office:value="2149.3088" calcext:value-type="float">
            <text:p>2149,30880</text:p>
          </table:table-cell>
          <table:table-cell table:style-name="ce19" office:value-type="float" office:value="0.78699" calcext:value-type="float">
            <text:p>0,78699</text:p>
          </table:table-cell>
          <table:table-cell table:style-name="ce19" office:value-type="float" office:value="0.30775" calcext:value-type="float">
            <text:p>0,30775</text:p>
          </table:table-cell>
          <table:table-cell table:style-name="ce19" office:value-type="float" office:value="0.690019444444445" calcext:value-type="float">
            <text:p>0,69002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7</text:p>
          </table:table-cell>
          <table:table-cell table:style-name="ce19" office:value-type="float" office:value="74.17" calcext:value-type="float">
            <text:p>74,17000</text:p>
          </table:table-cell>
          <table:table-cell table:style-name="ce19" office:value-type="float" office:value="40.49" calcext:value-type="float">
            <text:p>40,49000</text:p>
          </table:table-cell>
          <table:table-cell table:style-name="ce19" office:value-type="float" office:value="997" calcext:value-type="float">
            <text:p>997,00000</text:p>
          </table:table-cell>
          <table:table-cell table:style-name="ce19" office:value-type="float" office:value="208.8397" calcext:value-type="float">
            <text:p>208,83970</text:p>
          </table:table-cell>
          <table:table-cell table:style-name="ce19" office:value-type="float" office:value="147.244" calcext:value-type="float">
            <text:p>147,24400</text:p>
          </table:table-cell>
          <table:table-cell table:style-name="ce19" office:value-type="float" office:value="1984.7562" calcext:value-type="float">
            <text:p>1984,75620</text:p>
          </table:table-cell>
          <table:table-cell table:style-name="ce19" office:value-type="float" office:value="0.782016666666667" calcext:value-type="float">
            <text:p>0,78202</text:p>
          </table:table-cell>
          <table:table-cell table:style-name="ce19" office:value-type="float" office:value="0.37085" calcext:value-type="float">
            <text:p>0,37085</text:p>
          </table:table-cell>
          <table:table-cell table:style-name="ce19" office:value-type="float" office:value="0.692886111111111" calcext:value-type="float">
            <text:p>0,6928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8</text:p>
          </table:table-cell>
          <table:table-cell table:style-name="ce19" office:value-type="float" office:value="91.87" calcext:value-type="float">
            <text:p>91,87000</text:p>
          </table:table-cell>
          <table:table-cell table:style-name="ce19" office:value-type="float" office:value="65.26" calcext:value-type="float">
            <text:p>65,26000</text:p>
          </table:table-cell>
          <table:table-cell table:style-name="ce19" office:value-type="float" office:value="1114.34" calcext:value-type="float">
            <text:p>1114,34000</text:p>
          </table:table-cell>
          <table:table-cell table:style-name="ce19" office:value-type="float" office:value="270.99598" calcext:value-type="float">
            <text:p>270,99598</text:p>
          </table:table-cell>
          <table:table-cell table:style-name="ce19" office:value-type="float" office:value="190.8577" calcext:value-type="float">
            <text:p>190,85770</text:p>
          </table:table-cell>
          <table:table-cell table:style-name="ce19" office:value-type="float" office:value="2616.6984" calcext:value-type="float">
            <text:p>2616,69840</text:p>
          </table:table-cell>
          <table:table-cell table:style-name="ce19" office:value-type="float" office:value="1.00398" calcext:value-type="float">
            <text:p>1,00398</text:p>
          </table:table-cell>
          <table:table-cell table:style-name="ce19" office:value-type="float" office:value="0.45935" calcext:value-type="float">
            <text:p>0,45935</text:p>
          </table:table-cell>
          <table:table-cell table:style-name="ce19" office:value-type="float" office:value="0.887688888888889" calcext:value-type="float">
            <text:p>0,8876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9</text:p>
          </table:table-cell>
          <table:table-cell table:style-name="ce19" office:value-type="float" office:value="48.14" calcext:value-type="float">
            <text:p>48,14000</text:p>
          </table:table-cell>
          <table:table-cell table:style-name="ce19" office:value-type="float" office:value="72.72" calcext:value-type="float">
            <text:p>72,72000</text:p>
          </table:table-cell>
          <table:table-cell table:style-name="ce19" office:value-type="float" office:value="976.69" calcext:value-type="float">
            <text:p>976,69000</text:p>
          </table:table-cell>
          <table:table-cell table:style-name="ce19" office:value-type="float" office:value="227.33473" calcext:value-type="float">
            <text:p>227,33473</text:p>
          </table:table-cell>
          <table:table-cell table:style-name="ce19" office:value-type="float" office:value="160.13595" calcext:value-type="float">
            <text:p>160,13595</text:p>
          </table:table-cell>
          <table:table-cell table:style-name="ce19" office:value-type="float" office:value="2475.0748" calcext:value-type="float">
            <text:p>2475,07480</text:p>
          </table:table-cell>
          <table:table-cell table:style-name="ce19" office:value-type="float" office:value="0.84963" calcext:value-type="float">
            <text:p>0,84963</text:p>
          </table:table-cell>
          <table:table-cell table:style-name="ce19" office:value-type="float" office:value="0.2407" calcext:value-type="float">
            <text:p>0,24070</text:p>
          </table:table-cell>
          <table:table-cell table:style-name="ce19" office:value-type="float" office:value="0.734769444444444" calcext:value-type="float">
            <text:p>0,73477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19" office:value-type="float" office:value="91.93" calcext:value-type="float">
            <text:p>91,93000</text:p>
          </table:table-cell>
          <table:table-cell table:style-name="ce19" office:value-type="float" office:value="83.39" calcext:value-type="float">
            <text:p>83,39000</text:p>
          </table:table-cell>
          <table:table-cell table:style-name="ce19" office:value-type="float" office:value="949.9" calcext:value-type="float">
            <text:p>949,90000</text:p>
          </table:table-cell>
          <table:table-cell table:style-name="ce19" office:value-type="float" office:value="284.32" calcext:value-type="float">
            <text:p>284,32000</text:p>
          </table:table-cell>
          <table:table-cell table:style-name="ce19" office:value-type="float" office:value="199.9855" calcext:value-type="float">
            <text:p>199,98550</text:p>
          </table:table-cell>
          <table:table-cell table:style-name="ce19" office:value-type="float" office:value="2787.1326" calcext:value-type="float">
            <text:p>2787,13260</text:p>
          </table:table-cell>
          <table:table-cell table:style-name="ce19" office:value-type="float" office:value="1.04001666666667" calcext:value-type="float">
            <text:p>1,04002</text:p>
          </table:table-cell>
          <table:table-cell table:style-name="ce19" office:value-type="float" office:value="0.45965" calcext:value-type="float">
            <text:p>0,45965</text:p>
          </table:table-cell>
          <table:table-cell table:style-name="ce19" office:value-type="float" office:value="0.917752777777778" calcext:value-type="float">
            <text:p>0,91775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19" office:value-type="float" office:value="115.68" calcext:value-type="float">
            <text:p>115,68000</text:p>
          </table:table-cell>
          <table:table-cell table:style-name="ce19" office:value-type="float" office:value="83.36" calcext:value-type="float">
            <text:p>83,36000</text:p>
          </table:table-cell>
          <table:table-cell table:style-name="ce19" office:value-type="float" office:value="1018.44" calcext:value-type="float">
            <text:p>1018,44000</text:p>
          </table:table-cell>
          <table:table-cell table:style-name="ce19" office:value-type="float" office:value="313.30468" calcext:value-type="float">
            <text:p>313,30468</text:p>
          </table:table-cell>
          <table:table-cell table:style-name="ce19" office:value-type="float" office:value="220.3502" calcext:value-type="float">
            <text:p>220,35020</text:p>
          </table:table-cell>
          <table:table-cell table:style-name="ce19" office:value-type="float" office:value="2932.0688" calcext:value-type="float">
            <text:p>2932,06880</text:p>
          </table:table-cell>
          <table:table-cell table:style-name="ce19" office:value-type="float" office:value="1.14188" calcext:value-type="float">
            <text:p>1,14188</text:p>
          </table:table-cell>
          <table:table-cell table:style-name="ce19" office:value-type="float" office:value="0.5784" calcext:value-type="float">
            <text:p>0,57840</text:p>
          </table:table-cell>
          <table:table-cell table:style-name="ce19" office:value-type="float" office:value="1.01583333333333" calcext:value-type="float">
            <text:p>1,01583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2</text:p>
          </table:table-cell>
          <table:table-cell table:style-name="ce19" office:value-type="float" office:value="132.18" calcext:value-type="float">
            <text:p>132,18000</text:p>
          </table:table-cell>
          <table:table-cell table:style-name="ce19" office:value-type="float" office:value="63.11" calcext:value-type="float">
            <text:p>63,11000</text:p>
          </table:table-cell>
          <table:table-cell table:style-name="ce19" office:value-type="float" office:value="1032.45" calcext:value-type="float">
            <text:p>1032,45000</text:p>
          </table:table-cell>
          <table:table-cell table:style-name="ce19" office:value-type="float" office:value="301.92595" calcext:value-type="float">
            <text:p>301,92595</text:p>
          </table:table-cell>
          <table:table-cell table:style-name="ce19" office:value-type="float" office:value="212.42075" calcext:value-type="float">
            <text:p>212,42075</text:p>
          </table:table-cell>
          <table:table-cell table:style-name="ce19" office:value-type="float" office:value="2625.7238" calcext:value-type="float">
            <text:p>2625,72380</text:p>
          </table:table-cell>
          <table:table-cell table:style-name="ce19" office:value-type="float" office:value="1.1003" calcext:value-type="float">
            <text:p>1,10030</text:p>
          </table:table-cell>
          <table:table-cell table:style-name="ce19" office:value-type="float" office:value="0.6609" calcext:value-type="float">
            <text:p>0,66090</text:p>
          </table:table-cell>
          <table:table-cell table:style-name="ce19" office:value-type="float" office:value="0.99035" calcext:value-type="float">
            <text:p>0,99035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3</text:p>
          </table:table-cell>
          <table:table-cell table:style-name="ce19" office:value-type="float" office:value="95.94" calcext:value-type="float">
            <text:p>95,94000</text:p>
          </table:table-cell>
          <table:table-cell table:style-name="ce19" office:value-type="float" office:value="76.08" calcext:value-type="float">
            <text:p>76,08000</text:p>
          </table:table-cell>
          <table:table-cell table:style-name="ce19" office:value-type="float" office:value="1204.77" calcext:value-type="float">
            <text:p>1204,77000</text:p>
          </table:table-cell>
          <table:table-cell table:style-name="ce19" office:value-type="float" office:value="297.50169" calcext:value-type="float">
            <text:p>297,50169</text:p>
          </table:table-cell>
          <table:table-cell table:style-name="ce19" office:value-type="float" office:value="209.50035" calcext:value-type="float">
            <text:p>209,50035</text:p>
          </table:table-cell>
          <table:table-cell table:style-name="ce19" office:value-type="float" office:value="2920.0524" calcext:value-type="float">
            <text:p>2920,05240</text:p>
          </table:table-cell>
          <table:table-cell table:style-name="ce19" office:value-type="float" office:value="1.10179" calcext:value-type="float">
            <text:p>1,10179</text:p>
          </table:table-cell>
          <table:table-cell table:style-name="ce19" office:value-type="float" office:value="0.4797" calcext:value-type="float">
            <text:p>0,47970</text:p>
          </table:table-cell>
          <table:table-cell table:style-name="ce19" office:value-type="float" office:value="0.971458333333333" calcext:value-type="float">
            <text:p>0,97146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4</text:p>
          </table:table-cell>
          <table:table-cell table:style-name="ce19" office:value-type="float" office:value="30.28" calcext:value-type="float">
            <text:p>30,28000</text:p>
          </table:table-cell>
          <table:table-cell table:style-name="ce19" office:value-type="float" office:value="27.87" calcext:value-type="float">
            <text:p>27,87000</text:p>
          </table:table-cell>
          <table:table-cell table:style-name="ce19" office:value-type="float" office:value="1080.73" calcext:value-type="float">
            <text:p>1080,73000</text:p>
          </table:table-cell>
          <table:table-cell table:style-name="ce19" office:value-type="float" office:value="153.35031" calcext:value-type="float">
            <text:p>153,35031</text:p>
          </table:table-cell>
          <table:table-cell table:style-name="ce19" office:value-type="float" office:value="108.50615" calcext:value-type="float">
            <text:p>108,50615</text:p>
          </table:table-cell>
          <table:table-cell table:style-name="ce19" office:value-type="float" office:value="1693.3174" calcext:value-type="float">
            <text:p>1693,31740</text:p>
          </table:table-cell>
          <table:table-cell table:style-name="ce19" office:value-type="float" office:value="0.600526666666667" calcext:value-type="float">
            <text:p>0,60053</text:p>
          </table:table-cell>
          <table:table-cell table:style-name="ce19" office:value-type="float" office:value="0.1514" calcext:value-type="float">
            <text:p>0,15140</text:p>
          </table:table-cell>
          <table:table-cell table:style-name="ce19" office:value-type="float" office:value="0.517261111111111" calcext:value-type="float">
            <text:p>0,51726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5</text:p>
          </table:table-cell>
          <table:table-cell table:style-name="ce19" office:value-type="float" office:value="35.32" calcext:value-type="float">
            <text:p>35,32000</text:p>
          </table:table-cell>
          <table:table-cell table:style-name="ce19" office:value-type="float" office:value="60.98" calcext:value-type="float">
            <text:p>60,98000</text:p>
          </table:table-cell>
          <table:table-cell table:style-name="ce19" office:value-type="float" office:value="988.24" calcext:value-type="float">
            <text:p>988,24000</text:p>
          </table:table-cell>
          <table:table-cell table:style-name="ce19" office:value-type="float" office:value="198.61588" calcext:value-type="float">
            <text:p>198,61588</text:p>
          </table:table-cell>
          <table:table-cell table:style-name="ce19" office:value-type="float" office:value="140.0572" calcext:value-type="float">
            <text:p>140,05720</text:p>
          </table:table-cell>
          <table:table-cell table:style-name="ce19" office:value-type="float" office:value="2228.3676" calcext:value-type="float">
            <text:p>2228,36760</text:p>
          </table:table-cell>
          <table:table-cell table:style-name="ce19" office:value-type="float" office:value="0.752046666666667" calcext:value-type="float">
            <text:p>0,75205</text:p>
          </table:table-cell>
          <table:table-cell table:style-name="ce19" office:value-type="float" office:value="0.1766" calcext:value-type="float">
            <text:p>0,17660</text:p>
          </table:table-cell>
          <table:table-cell table:style-name="ce19" office:value-type="float" office:value="0.646327777777778" calcext:value-type="float">
            <text:p>0,64633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6</text:p>
          </table:table-cell>
          <table:table-cell table:style-name="ce19" office:value-type="float" office:value="85.37" calcext:value-type="float">
            <text:p>85,37000</text:p>
          </table:table-cell>
          <table:table-cell table:style-name="ce19" office:value-type="float" office:value="60.24" calcext:value-type="float">
            <text:p>60,24000</text:p>
          </table:table-cell>
          <table:table-cell table:style-name="ce19" office:value-type="float" office:value="1085.93" calcext:value-type="float">
            <text:p>1085,93000</text:p>
          </table:table-cell>
          <table:table-cell table:style-name="ce19" office:value-type="float" office:value="255.12981" calcext:value-type="float">
            <text:p>255,12981</text:p>
          </table:table-cell>
          <table:table-cell table:style-name="ce19" office:value-type="float" office:value="179.72515" calcext:value-type="float">
            <text:p>179,72515</text:p>
          </table:table-cell>
          <table:table-cell table:style-name="ce19" office:value-type="float" office:value="2474.5592" calcext:value-type="float">
            <text:p>2474,55920</text:p>
          </table:table-cell>
          <table:table-cell table:style-name="ce19" office:value-type="float" office:value="0.947743333333333" calcext:value-type="float">
            <text:p>0,94774</text:p>
          </table:table-cell>
          <table:table-cell table:style-name="ce19" office:value-type="float" office:value="0.42685" calcext:value-type="float">
            <text:p>0,42685</text:p>
          </table:table-cell>
          <table:table-cell table:style-name="ce19" office:value-type="float" office:value="0.837213888888889" calcext:value-type="float">
            <text:p>0,83721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7</text:p>
          </table:table-cell>
          <table:table-cell table:style-name="ce19" office:value-type="float" office:value="93.56" calcext:value-type="float">
            <text:p>93,56000</text:p>
          </table:table-cell>
          <table:table-cell table:style-name="ce19" office:value-type="float" office:value="44.72" calcext:value-type="float">
            <text:p>44,72000</text:p>
          </table:table-cell>
          <table:table-cell table:style-name="ce19" office:value-type="float" office:value="1125.68" calcext:value-type="float">
            <text:p>1125,68000</text:p>
          </table:table-cell>
          <table:table-cell table:style-name="ce19" office:value-type="float" office:value="244.18696" calcext:value-type="float">
            <text:p>244,18696</text:p>
          </table:table-cell>
          <table:table-cell table:style-name="ce19" office:value-type="float" office:value="172.1244" calcext:value-type="float">
            <text:p>172,12440</text:p>
          </table:table-cell>
          <table:table-cell table:style-name="ce19" office:value-type="float" office:value="2254.3456" calcext:value-type="float">
            <text:p>2254,34560</text:p>
          </table:table-cell>
          <table:table-cell table:style-name="ce19" office:value-type="float" office:value="0.910693333333333" calcext:value-type="float">
            <text:p>0,91069</text:p>
          </table:table-cell>
          <table:table-cell table:style-name="ce19" office:value-type="float" office:value="0.4678" calcext:value-type="float">
            <text:p>0,46780</text:p>
          </table:table-cell>
          <table:table-cell table:style-name="ce19" office:value-type="float" office:value="0.810888888888889" calcext:value-type="float">
            <text:p>0,8108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8</text:p>
          </table:table-cell>
          <table:table-cell table:style-name="ce19" office:value-type="float" office:value="61.05" calcext:value-type="float">
            <text:p>61,05000</text:p>
          </table:table-cell>
          <table:table-cell table:style-name="ce19" office:value-type="float" office:value="54.47" calcext:value-type="float">
            <text:p>54,47000</text:p>
          </table:table-cell>
          <table:table-cell table:style-name="ce19" office:value-type="float" office:value="1131.2" calcext:value-type="float">
            <text:p>1131,20000</text:p>
          </table:table-cell>
          <table:table-cell table:style-name="ce19" office:value-type="float" office:value="226.0445" calcext:value-type="float">
            <text:p>226,04450</text:p>
          </table:table-cell>
          <table:table-cell table:style-name="ce19" office:value-type="float" office:value="159.421" calcext:value-type="float">
            <text:p>159,42100</text:p>
          </table:table-cell>
          <table:table-cell table:style-name="ce19" office:value-type="float" office:value="2334.5182" calcext:value-type="float">
            <text:p>2334,51820</text:p>
          </table:table-cell>
          <table:table-cell table:style-name="ce19" office:value-type="float" office:value="0.852916666666667" calcext:value-type="float">
            <text:p>0,85292</text:p>
          </table:table-cell>
          <table:table-cell table:style-name="ce19" office:value-type="float" office:value="0.30525" calcext:value-type="float">
            <text:p>0,30525</text:p>
          </table:table-cell>
          <table:table-cell table:style-name="ce19" office:value-type="float" office:value="0.744680555555556" calcext:value-type="float">
            <text:p>0,74468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B19</text:p>
          </table:table-cell>
          <table:table-cell table:style-name="ce19" office:value-type="float" office:value="29.4973624985737" calcext:value-type="float">
            <text:p>29,49736</text:p>
          </table:table-cell>
          <table:table-cell table:style-name="ce19" office:value-type="float" office:value="53.7003666370581" calcext:value-type="float">
            <text:p>53,70037</text:p>
          </table:table-cell>
          <table:table-cell table:style-name="ce19" office:value-type="float" office:value="1122.83429573404" calcext:value-type="float">
            <text:p>1122,83430</text:p>
          </table:table-cell>
          <table:table-cell table:style-name="ce19" office:value-type="float" office:value="192.747127561088" calcext:value-type="float">
            <text:p>192,74713</text:p>
          </table:table-cell>
          <table:table-cell table:style-name="ce19" office:value-type="float" office:value="136.104406651432" calcext:value-type="float">
            <text:p>136,10441</text:p>
          </table:table-cell>
          <table:table-cell table:style-name="ce19" office:value-type="float" office:value="2209.71451834951" calcext:value-type="float">
            <text:p>2209,71452</text:p>
          </table:table-cell>
          <table:table-cell table:style-name="ce19" office:value-type="float" office:value="0.741104473425217" calcext:value-type="float">
            <text:p>0,74110</text:p>
          </table:table-cell>
          <table:table-cell table:style-name="ce19" office:value-type="float" office:value="0.147486812492868" calcext:value-type="float">
            <text:p>0,14749</text:p>
          </table:table-cell>
          <table:table-cell table:style-name="ce19" office:value-type="float" office:value="0.633974484797999" calcext:value-type="float">
            <text:p>0,63397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B20</text:p>
          </table:table-cell>
          <table:table-cell table:style-name="ce21" office:value-type="float" office:value="19.9904799923845" calcext:value-type="float">
            <text:p>19,99048</text:p>
          </table:table-cell>
          <table:table-cell table:style-name="ce21" office:value-type="float" office:value="54.9264803248037" calcext:value-type="float">
            <text:p>54,92648</text:p>
          </table:table-cell>
          <table:table-cell table:style-name="ce21" office:value-type="float" office:value="940.896156995724" calcext:value-type="float">
            <text:p>940,89616</text:p>
          </table:table-cell>
          <table:table-cell table:style-name="ce21" office:value-type="float" office:value="170.984350945524" calcext:value-type="float">
            <text:p>170,98435</text:p>
          </table:table-cell>
          <table:table-cell table:style-name="ce21" table:formula="of:=[.C100]+0.7*[.B100]+0.055*[.D100]" office:value-type="float" office:value="120.669104954238" calcext:value-type="float">
            <text:p>120,66910</text:p>
          </table:table-cell>
          <table:table-cell table:style-name="ce21" table:formula="of:=[.D100]+13.24*[.B100]+18.46*[.C100]" office:value-type="float" office:value="2219.51293889077" calcext:value-type="float">
            <text:p>2219,51294</text:p>
          </table:table-cell>
          <table:table-cell table:style-name="ce21" table:formula="of:=[.B100]/300+[.C100]/200+[.D100]/3000" office:value-type="float" office:value="0.654899387263874" calcext:value-type="float">
            <text:p>0,65490</text:p>
          </table:table-cell>
          <table:table-cell table:style-name="ce21" table:formula="of:=[.B100]/200" office:value-type="float" office:value="0.0999523999619223" calcext:value-type="float">
            <text:p>0,09995</text:p>
          </table:table-cell>
          <table:table-cell table:style-name="ce21" table:formula="of:=[.B100]/360+[.C100]/240+[.D100]/3600" office:value-type="float" office:value="0.545749489386562" calcext:value-type="float">
            <text:p>0,54575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1</text:p>
          </table:table-cell>
          <table:table-cell table:style-name="ce19" office:value-type="float" office:value="43.124515941216" calcext:value-type="float">
            <text:p>43,12452</text:p>
          </table:table-cell>
          <table:table-cell table:style-name="ce19" office:value-type="float" office:value="86.1516424822476" calcext:value-type="float">
            <text:p>86,15164</text:p>
          </table:table-cell>
          <table:table-cell table:style-name="ce19" office:value-type="float" office:value="812.585224701404" calcext:value-type="float">
            <text:p>812,58522</text:p>
          </table:table-cell>
          <table:table-cell table:style-name="ce19" office:value-type="float" office:value="228.890426992838" calcext:value-type="float">
            <text:p>228,89043</text:p>
          </table:table-cell>
          <table:table-cell table:style-name="ce19" office:value-type="float" office:value="161.030990999676" calcext:value-type="float">
            <text:p>161,03099</text:p>
          </table:table-cell>
          <table:table-cell table:style-name="ce19" office:value-type="float" office:value="2542.66797657324" calcext:value-type="float">
            <text:p>2542,66798</text:p>
          </table:table-cell>
          <table:table-cell table:style-name="ce19" office:value-type="float" office:value="0.845368340449093" calcext:value-type="float">
            <text:p>0,84537</text:p>
          </table:table-cell>
          <table:table-cell table:style-name="ce19" office:value-type="float" office:value="0.21562257970608" calcext:value-type="float">
            <text:p>0,21562</text:p>
          </table:table-cell>
          <table:table-cell table:style-name="ce19" office:value-type="float" office:value="0.728431681452697" calcext:value-type="float">
            <text:p>0,72843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2</text:p>
          </table:table-cell>
          <table:table-cell table:style-name="ce19" office:value-type="float" office:value="121.707810365696" calcext:value-type="float">
            <text:p>121,70781</text:p>
          </table:table-cell>
          <table:table-cell table:style-name="ce19" office:value-type="float" office:value="71.7059663810388" calcext:value-type="float">
            <text:p>71,70597</text:p>
          </table:table-cell>
          <table:table-cell table:style-name="ce19" office:value-type="float" office:value="984.969576085362" calcext:value-type="float">
            <text:p>984,96958</text:p>
          </table:table-cell>
          <table:table-cell table:style-name="ce19" office:value-type="float" office:value="300.089999649154" calcext:value-type="float">
            <text:p>300,09000</text:p>
          </table:table-cell>
          <table:table-cell table:style-name="ce19" office:value-type="float" office:value="211.074760321721" calcext:value-type="float">
            <text:p>211,07476</text:p>
          </table:table-cell>
          <table:table-cell table:style-name="ce19" office:value-type="float" office:value="2702.99502106419" calcext:value-type="float">
            <text:p>2702,99502</text:p>
          </table:table-cell>
          <table:table-cell table:style-name="ce19" office:value-type="float" office:value="1.09254572515263" calcext:value-type="float">
            <text:p>1,09255</text:p>
          </table:table-cell>
          <table:table-cell table:style-name="ce19" office:value-type="float" office:value="0.60853905182848" calcext:value-type="float">
            <text:p>0,60854</text:p>
          </table:table-cell>
          <table:table-cell table:style-name="ce19" office:value-type="float" office:value="0.978070221163693" calcext:value-type="float">
            <text:p>0,97807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3</text:p>
          </table:table-cell>
          <table:table-cell table:style-name="ce19" office:value-type="float" office:value="106.78981450034" calcext:value-type="float">
            <text:p>106,78981</text:p>
          </table:table-cell>
          <table:table-cell table:style-name="ce19" office:value-type="float" office:value="74.551156731114" calcext:value-type="float">
            <text:p>74,55116</text:p>
          </table:table-cell>
          <table:table-cell table:style-name="ce19" office:value-type="float" office:value="933.833977625579" calcext:value-type="float">
            <text:p>933,83398</text:p>
          </table:table-cell>
          <table:table-cell table:style-name="ce19" office:value-type="float" office:value="285.303184903003" calcext:value-type="float">
            <text:p>285,30318</text:p>
          </table:table-cell>
          <table:table-cell table:style-name="ce19" office:value-type="float" office:value="200.664895650759" calcext:value-type="float">
            <text:p>200,66490</text:p>
          </table:table-cell>
          <table:table-cell table:style-name="ce19" office:value-type="float" office:value="2656.04732986304" calcext:value-type="float">
            <text:p>2656,04733</text:p>
          </table:table-cell>
          <table:table-cell table:style-name="ce19" office:value-type="float" office:value="1.0399998245319" calcext:value-type="float">
            <text:p>1,04000</text:p>
          </table:table-cell>
          <table:table-cell table:style-name="ce19" office:value-type="float" office:value="0.533949072501701" calcext:value-type="float">
            <text:p>0,53395</text:p>
          </table:table-cell>
          <table:table-cell table:style-name="ce19" office:value-type="float" office:value="0.925994195165659" calcext:value-type="float">
            <text:p>0,9259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4</text:p>
          </table:table-cell>
          <table:table-cell table:style-name="ce19" office:value-type="float" office:value="62.5471106275992" calcext:value-type="float">
            <text:p>62,54711</text:p>
          </table:table-cell>
          <table:table-cell table:style-name="ce19" office:value-type="float" office:value="48.1024287909879" calcext:value-type="float">
            <text:p>48,10243</text:p>
          </table:table-cell>
          <table:table-cell table:style-name="ce19" office:value-type="float" office:value="734.875088957676" calcext:value-type="float">
            <text:p>734,87509</text:p>
          </table:table-cell>
          <table:table-cell table:style-name="ce19" office:value-type="float" office:value="187.918965648453" calcext:value-type="float">
            <text:p>187,91897</text:p>
          </table:table-cell>
          <table:table-cell table:style-name="ce19" office:value-type="float" office:value="132.30353612298" calcext:value-type="float">
            <text:p>132,30354</text:p>
          </table:table-cell>
          <table:table-cell table:style-name="ce19" office:value-type="float" office:value="1825.49856287273" calcext:value-type="float">
            <text:p>1825,49856</text:p>
          </table:table-cell>
          <table:table-cell table:style-name="ce19" office:value-type="float" office:value="0.693960875699495" calcext:value-type="float">
            <text:p>0,69396</text:p>
          </table:table-cell>
          <table:table-cell table:style-name="ce19" office:value-type="float" office:value="0.312735553137996" calcext:value-type="float">
            <text:p>0,31274</text:p>
          </table:table-cell>
          <table:table-cell table:style-name="ce19" office:value-type="float" office:value="0.61304912454269" calcext:value-type="float">
            <text:p>0,61305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5</text:p>
          </table:table-cell>
          <table:table-cell table:style-name="ce19" office:value-type="float" office:value="130.5" calcext:value-type="float">
            <text:p>130,50000</text:p>
          </table:table-cell>
          <table:table-cell table:style-name="ce19" office:value-type="float" office:value="70.91" calcext:value-type="float">
            <text:p>70,91000</text:p>
          </table:table-cell>
          <table:table-cell table:style-name="ce19" office:value-type="float" office:value="973.18" calcext:value-type="float">
            <text:p>973,18000</text:p>
          </table:table-cell>
          <table:table-cell table:style-name="ce19" office:value-type="float" office:value="306.83616" calcext:value-type="float">
            <text:p>306,83616</text:p>
          </table:table-cell>
          <table:table-cell table:style-name="ce19" office:value-type="float" office:value="215.7849" calcext:value-type="float">
            <text:p>215,78490</text:p>
          </table:table-cell>
          <table:table-cell table:style-name="ce19" office:value-type="float" office:value="2704.9986" calcext:value-type="float">
            <text:p>2704,99860</text:p>
          </table:table-cell>
          <table:table-cell table:style-name="ce19" office:value-type="float" office:value="1.11394333333333" calcext:value-type="float">
            <text:p>1,11394</text:p>
          </table:table-cell>
          <table:table-cell table:style-name="ce19" office:value-type="float" office:value="0.6525" calcext:value-type="float">
            <text:p>0,65250</text:p>
          </table:table-cell>
          <table:table-cell table:style-name="ce19" office:value-type="float" office:value="1.00078611111111" calcext:value-type="float">
            <text:p>1,00079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6</text:p>
          </table:table-cell>
          <table:table-cell table:style-name="ce19" office:value-type="float" office:value="90.11" calcext:value-type="float">
            <text:p>90,11000</text:p>
          </table:table-cell>
          <table:table-cell table:style-name="ce19" office:value-type="float" office:value="70.89" calcext:value-type="float">
            <text:p>70,89000</text:p>
          </table:table-cell>
          <table:table-cell table:style-name="ce19" office:value-type="float" office:value="864.52" calcext:value-type="float">
            <text:p>864,52000</text:p>
          </table:table-cell>
          <table:table-cell table:style-name="ce19" office:value-type="float" office:value="258.05074" calcext:value-type="float">
            <text:p>258,05074</text:p>
          </table:table-cell>
          <table:table-cell table:style-name="ce19" office:value-type="float" office:value="181.5156" calcext:value-type="float">
            <text:p>181,51560</text:p>
          </table:table-cell>
          <table:table-cell table:style-name="ce19" office:value-type="float" office:value="2465.1058" calcext:value-type="float">
            <text:p>2465,10580</text:p>
          </table:table-cell>
          <table:table-cell table:style-name="ce19" office:value-type="float" office:value="0.94299" calcext:value-type="float">
            <text:p>0,94299</text:p>
          </table:table-cell>
          <table:table-cell table:style-name="ce19" office:value-type="float" office:value="0.45055" calcext:value-type="float">
            <text:p>0,45055</text:p>
          </table:table-cell>
          <table:table-cell table:style-name="ce19" office:value-type="float" office:value="0.835886111111111" calcext:value-type="float">
            <text:p>0,83589</text:p>
          </table:table-cell>
          <table:table-cell table:style-name="ce6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PP7</text:p>
          </table:table-cell>
          <table:table-cell table:style-name="ce19" office:value-type="float" office:value="109.68" calcext:value-type="float">
            <text:p>109,68000</text:p>
          </table:table-cell>
          <table:table-cell table:style-name="ce19" office:value-type="float" office:value="62.16" calcext:value-type="float">
            <text:p>62,16000</text:p>
          </table:table-cell>
          <table:table-cell table:style-name="ce19" office:value-type="float" office:value="822.28" calcext:value-type="float">
            <text:p>822,28000</text:p>
          </table:table-cell>
          <table:table-cell table:style-name="ce19" office:value-type="float" office:value="261.88436" calcext:value-type="float">
            <text:p>261,88436</text:p>
          </table:table-cell>
          <table:table-cell table:style-name="ce19" office:value-type="float" office:value="184.1614" calcext:value-type="float">
            <text:p>184,16140</text:p>
          </table:table-cell>
          <table:table-cell table:style-name="ce19" office:value-type="float" office:value="2325.1168" calcext:value-type="float">
            <text:p>2325,11680</text:p>
          </table:table-cell>
          <table:table-cell table:style-name="ce19" office:value-type="float" office:value="0.950493333333333" calcext:value-type="float">
            <text:p>0,95049</text:p>
          </table:table-cell>
          <table:table-cell table:style-name="ce19" office:value-type="float" office:value="0.5484" calcext:value-type="float">
            <text:p>0,54840</text:p>
          </table:table-cell>
          <table:table-cell table:style-name="ce19" office:value-type="float" office:value="0.853011111111111" calcext:value-type="float">
            <text:p>0,85301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2" office:value-type="string" calcext:value-type="string">
            <text:p>PP8</text:p>
          </table:table-cell>
          <table:table-cell table:style-name="ce19" office:value-type="float" office:value="56.09" calcext:value-type="float">
            <text:p>56,09000</text:p>
          </table:table-cell>
          <table:table-cell table:style-name="ce19" office:value-type="float" office:value="64.54" calcext:value-type="float">
            <text:p>64,54000</text:p>
          </table:table-cell>
          <table:table-cell table:style-name="ce19" office:value-type="float" office:value="922.46" calcext:value-type="float">
            <text:p>922,46000</text:p>
          </table:table-cell>
          <table:table-cell table:style-name="ce19" office:value-type="float" office:value="219.41162" calcext:value-type="float">
            <text:p>219,41162</text:p>
          </table:table-cell>
          <table:table-cell table:style-name="ce19" office:value-type="float" office:value="154.5383" calcext:value-type="float">
            <text:p>154,53830</text:p>
          </table:table-cell>
          <table:table-cell table:style-name="ce19" office:value-type="float" office:value="2295.6" calcext:value-type="float">
            <text:p>2295,60000</text:p>
          </table:table-cell>
          <table:table-cell table:style-name="ce19" office:value-type="float" office:value="0.817153333333333" calcext:value-type="float">
            <text:p>0,81715</text:p>
          </table:table-cell>
          <table:table-cell table:style-name="ce19" office:value-type="float" office:value="0.28045" calcext:value-type="float">
            <text:p>0,28045</text:p>
          </table:table-cell>
          <table:table-cell table:style-name="ce19" office:value-type="float" office:value="0.712122222222222" calcext:value-type="float">
            <text:p>0,71212</text:p>
          </table:table-cell>
          <table:table-cell table:style-name="ce6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PP9</text:p>
          </table:table-cell>
          <table:table-cell table:style-name="ce19" office:value-type="float" office:value="91.45" calcext:value-type="float">
            <text:p>91,45000</text:p>
          </table:table-cell>
          <table:table-cell table:style-name="ce19" office:value-type="float" office:value="59.21" calcext:value-type="float">
            <text:p>59,21000</text:p>
          </table:table-cell>
          <table:table-cell table:style-name="ce19" office:value-type="float" office:value="796.38" calcext:value-type="float">
            <text:p>796,38000</text:p>
          </table:table-cell>
          <table:table-cell table:style-name="ce19" office:value-type="float" office:value="237.44156" calcext:value-type="float">
            <text:p>237,44156</text:p>
          </table:table-cell>
          <table:table-cell table:style-name="ce19" office:value-type="float" office:value="167.0259" calcext:value-type="float">
            <text:p>167,02590</text:p>
          </table:table-cell>
          <table:table-cell table:style-name="ce19" office:value-type="float" office:value="2185.6946" calcext:value-type="float">
            <text:p>2185,69460</text:p>
          </table:table-cell>
          <table:table-cell table:style-name="ce19" office:value-type="float" office:value="0.866343333333333" calcext:value-type="float">
            <text:p>0,86634</text:p>
          </table:table-cell>
          <table:table-cell table:style-name="ce19" office:value-type="float" office:value="0.45725" calcext:value-type="float">
            <text:p>0,45725</text:p>
          </table:table-cell>
          <table:table-cell table:style-name="ce19" office:value-type="float" office:value="0.772758333333333" calcext:value-type="float">
            <text:p>0,77276</text:p>
          </table:table-cell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3" office:value-type="string" calcext:value-type="string">
            <text:p>PP10</text:p>
          </table:table-cell>
          <table:table-cell table:style-name="ce20" office:value-type="float" office:value="96.2833857292362" calcext:value-type="float">
            <text:p>96,28339</text:p>
          </table:table-cell>
          <table:table-cell table:style-name="ce20" office:value-type="float" office:value="68.5760251153178" calcext:value-type="float">
            <text:p>68,57603</text:p>
          </table:table-cell>
          <table:table-cell table:style-name="ce20" office:value-type="float" office:value="859.358654003096" calcext:value-type="float">
            <text:p>859,35865</text:p>
          </table:table-cell>
          <table:table-cell table:style-name="ce20" office:value-type="float" office:value="260.517718002379" calcext:value-type="float">
            <text:p>260,51772</text:p>
          </table:table-cell>
          <table:table-cell table:style-name="ce20" office:value-type="float" office:value="183.239121095953" calcext:value-type="float">
            <text:p>183,23912</text:p>
          </table:table-cell>
          <table:table-cell table:style-name="ce20" office:value-type="float" office:value="2437.23024739459" calcext:value-type="float">
            <text:p>2437,23025</text:p>
          </table:table-cell>
          <table:table-cell table:style-name="ce20" office:value-type="float" office:value="0.950277629341742" calcext:value-type="float">
            <text:p>0,95028</text:p>
          </table:table-cell>
          <table:table-cell table:style-name="ce20" office:value-type="float" office:value="0.481416928646181" calcext:value-type="float">
            <text:p>0,48142</text:p>
          </table:table-cell>
          <table:table-cell table:style-name="ce20" office:value-type="float" office:value="0.845388794301027" calcext:value-type="float">
            <text:p>0,84539</text:p>
          </table:table-cell>
          <table:table-cell table:style-name="ce9" table:number-columns-repeated="11"/>
          <table:table-cell table:number-columns-repeated="1001"/>
        </table:table-row>
        <table:table-row table:style-name="ro1" table:number-rows-repeated="2">
          <table:table-cell table:style-name="ce5"/>
          <table:table-cell table:style-name="ce6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6"/>
          <table:table-cell table:style-name="ce9" table:number-columns-repeated="3"/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5"/>
          <table:table-cell table:style-name="ce6" table:number-columns-repeated="9"/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5" table:number-columns-repeated="7"/>
          <table:table-cell table:style-name="ce9" table:number-columns-repeated="3"/>
          <table:table-cell table:style-name="ce5" table:number-columns-repeated="9"/>
          <table:table-cell table:number-columns-repeated="1003"/>
        </table:table-row>
        <table:table-row table:style-name="ro1">
          <table:table-cell table:style-name="ce5"/>
          <table:table-cell table:style-name="ce9" table:number-columns-repeated="3"/>
          <table:table-cell table:style-name="ce5" table:number-columns-repeated="15"/>
          <table:table-cell table:number-columns-repeated="1003"/>
        </table:table-row>
        <table:table-row table:style-name="ro1" table:number-rows-repeated="3">
          <table:table-cell table:style-name="ce5" table:number-columns-repeated="19"/>
          <table:table-cell table:number-columns-repeated="1003"/>
        </table:table-row>
        <table:table-row table:style-name="ro2" table:number-rows-repeated="104845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Ratio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">
      <number:number number:decimal-places="3" number:min-decimal-places="3" number:min-integer-digits="1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48">
      <number:number number:decimal-places="5" number:min-decimal-places="5" number:min-integer-digits="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46">
      <number:number number:decimal-places="1" number:min-decimal-places="1" number:min-integer-digits="1"/>
    </number:number-style>
    <number:number-style style:name="N11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4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43">
      <number:day/>
      <number:text>/</number:text>
      <number:month/>
      <number:text>/</number:text>
      <number:year number:style="long"/>
    </number:date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41">
      <number:day/>
      <number:text>/</number:text>
      <number:month number:textual="true"/>
      <number:text>/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day/>
      <number:text>/</number:text>
      <number:month number:textual="true"/>
    </number:date-style>
    <number:date-style style:name="N11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8">
      <number:minutes number:style="long"/>
      <number:text>:</number:text>
      <number:seconds number:style="long"/>
    </number:tim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37">
      <number:month number:textual="true"/>
      <number:text>/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yce</meta:initial-creator>
    <meta:creation-date>2025-08-16T19:44:37</meta:creation-date>
    <dc:date>2025-10-11T21:00:44.775385010</dc:date>
    <meta:generator>LibreOffice/7.3.7.2$Linux_X86_64 LibreOffice_project/30$Build-2</meta:generator>
    <meta:editing-duration>PT2M17S</meta:editing-duration>
    <meta:editing-cycles>3</meta:editing-cycles>
    <meta:document-statistic meta:table-count="3" meta:cell-count="1101" meta:object-count="0"/>
    <meta:user-defined meta:name="AppVersion">14.0300</meta:user-defined>
  </office:meta>
</office:document-meta>
</file>